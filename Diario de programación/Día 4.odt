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EuroLeague Insight — Diario de Desarrollo</text:h>
      <text:h text:style-name="Heading_20_1" text:outline-level="1">Día 4 — Del prototipo Flutter al producto real 🚀</text:h>
      <text:p text:style-name="Text_20_body">Hoy fue, probablemente, el día más transformador del proyecto hasta ahora.<text:line-break/>No tanto por cantidad de features añadidas, sino por el salto en:</text:p>
      <text:list text:style-name="L1">
        <text:list-item>
          <text:p text:style-name="P1">mentalidad,</text:p>
        </text:list-item>
        <text:list-item>
          <text:p text:style-name="P1">arquitectura,</text:p>
        </text:list-item>
        <text:list-item>
          <text:p text:style-name="P1">workflow,</text:p>
        </text:list-item>
        <text:list-item>
          <text:p text:style-name="P1">y refinamiento UX real.</text:p>
        </text:list-item>
      </text:list>
      <text:p text:style-name="Text_20_body">La app empezó el día siendo un prototipo funcional.<text:line-break/>La terminó pareciendo:</text:p>
      <text:h text:style-name="Heading_20_1" text:outline-level="1">un producto deportivo real con identidad propia.</text:h>
      <text:p text:style-name="Horizontal_20_Line"/>
      <text:h text:style-name="Heading_20_1" text:outline-level="1">🎯 Objetivo inicial del día</text:h>
      <text:p text:style-name="Text_20_body">La idea original era atacar el núcleo visual de la app:</text:p>
      <text:h text:style-name="Heading_20_2" text:outline-level="2">La pantalla MatchUp.</text:h>
      <text:p text:style-name="Text_20_body">Especialmente:</text:p>
      <text:list text:style-name="L2">
        <text:list-item>
          <text:p text:style-name="P2">porcentajes de victoria,</text:p>
        </text:list-item>
        <text:list-item>
          <text:p text:style-name="P2">estadísticas comparadas,</text:p>
        </text:list-item>
        <text:list-item>
          <text:p text:style-name="P2">scroll horizontal analytics,</text:p>
        </text:list-item>
        <text:list-item>
          <text:p text:style-name="P2">experiencia móvil.</text:p>
        </text:list-item>
      </text:list>
      <text:p text:style-name="Text_20_body">Había dudas iniciales porque el concepto:</text:p>
      <text:list text:style-name="L3">
        <text:list-item>
          <text:p text:style-name="P3">parecía complejo,</text:p>
        </text:list-item>
        <text:list-item>
          <text:p text:style-name="P3">implicaba varios niveles de layout,</text:p>
        </text:list-item>
        <text:list-item>
          <text:p text:style-name="P3">y empezábamos a entrar en UX más avanzada.</text:p>
        </text:list-item>
      </text:list>
      <text:p text:style-name="Text_20_body"><text:soft-page-break/>La sensación inicial fue:</text:p>
      <text:p text:style-name="P4"><text:span text:style-name="Source_20_Text">“esto igual es demasiado complicado”</text:span></text:p>
      <text:p text:style-name="Text_20_body">Pero finalmente:</text:p>
      <text:h text:style-name="Heading_20_1" text:outline-level="1">acabó siendo el mejor avance visual del proyecto.</text:h>
      <text:p text:style-name="Horizontal_20_Line"/>
      <text:h text:style-name="Heading_20_1" text:outline-level="1">🎨 Evolución del branding</text:h>
      <text:h text:style-name="Heading_20_2" text:outline-level="2">✅ Cambios realizados</text:h>
      <text:h text:style-name="Heading_20_3" text:outline-level="3">Nuevo icono profesional</text:h>
      <text:p text:style-name="Text_20_body">Se implementó el nuevo icono:</text:p>
      <text:list text:style-name="L4">
        <text:list-item>
          <text:p text:style-name="P5">minimalista,</text:p>
        </text:list-item>
        <text:list-item>
          <text:p text:style-name="P5">negro/naranja,</text:p>
        </text:list-item>
        <text:list-item>
          <text:p text:style-name="P5">con identidad mucho más clara.</text:p>
        </text:list-item>
      </text:list>
      <text:p text:style-name="Horizontal_20_Line"/>
      <text:h text:style-name="Heading_20_2" text:outline-level="2">Impacto real</text:h>
      <text:p text:style-name="Text_20_body">Al instalar la app en móvil:</text:p>
      <text:list text:style-name="L5">
        <text:list-item>
          <text:p text:style-name="P6">el icono ya no parecía “de prueba”,</text:p>
        </text:list-item>
        <text:list-item>
          <text:p text:style-name="P6">sino parte de una aplicación deportiva moderna.</text:p>
        </text:list-item>
      </text:list>
      <text:p text:style-name="Text_20_body">Muy importante:</text:p>
      <text:h text:style-name="Heading_20_1" text:outline-level="1">el icono funciona extremadamente bien en tamaño pequeño.</text:h>
      <text:p text:style-name="Horizontal_20_Line"/>
      <text:h text:style-name="Heading_20_1" text:outline-level="1">🧠 Insight importante</text:h>
      <text:p text:style-name="Text_20_body">Se entendió algo clave:</text:p>
      <text:list text:style-name="L6">
        <text:list-item>
          <text:p text:style-name="P7">un buen icono no necesita complejidad,</text:p>
        </text:list-item>
        <text:list-item>
          <text:p text:style-name="P7">necesita claridad y reconocimiento inmediato.</text:p>
        </text:list-item>
      </text:list>
      <text:p text:style-name="Horizontal_20_Line"><text:soft-page-break/></text:p>
      <text:h text:style-name="Heading_20_1" text:outline-level="1">🏷️ Renaming y consistencia</text:h>
      <text:p text:style-name="Text_20_body">Se actualizó:</text:p>
      <text:list text:style-name="L7">
        <text:list-item>
          <text:p text:style-name="P8">el título de pantallas,</text:p>
        </text:list-item>
        <text:list-item>
          <text:p text:style-name="P8">branding interno,</text:p>
        </text:list-item>
        <text:list-item>
          <text:p text:style-name="P8">nombre visual de la app.</text:p>
        </text:list-item>
      </text:list>
      <text:p text:style-name="Text_20_body">La transición:</text:p>
      <text:p text:style-name="P4"><text:span text:style-name="Source_20_Text">Euroleague Predictor</text:span></text:p>
      <text:p text:style-name="Text_20_body">↓</text:p>
      <text:p text:style-name="P4"><text:span text:style-name="Source_20_Text">EuroLeague Insight</text:span></text:p>
      <text:p text:style-name="Text_20_body">cambió muchísimo la percepción del proyecto.</text:p>
      <text:p text:style-name="Horizontal_20_Line"/>
      <text:h text:style-name="Heading_20_1" text:outline-level="1">🧱 Primer gran bloqueador técnico del día</text:h>
      <text:h text:style-name="Heading_20_2" text:outline-level="2">Intento de crear <text:span text:style-name="Source_20_Text">MatchUpScreenV2</text:span></text:h>
      <text:p text:style-name="Text_20_body">Se intentó crear una segunda pantalla experimental:</text:p>
      <text:p text:style-name="P4"><text:span text:style-name="Source_20_Text">matchup_screen_v2.dart</text:span></text:p>
      <text:p text:style-name="Text_20_body">para probar un nuevo sistema de estadísticas comparadas.</text:p>
      <text:p text:style-name="Horizontal_20_Line"/>
      <text:h text:style-name="Heading_20_1" text:outline-level="1">❌ Problemas encontrados</text:h>
      <text:h text:style-name="Heading_20_2" text:outline-level="2">Imports rotos</text:h>
      <text:p text:style-name="Text_20_body">Errores:</text:p>
      <text:p text:style-name="P4"><text:span text:style-name="Source_20_Text">Expected ';' after this.</text:span></text:p>
      <text:p text:style-name="Text_20_body">y:</text:p>
      <text:p text:style-name="P4"><text:span text:style-name="Source_20_Text">Error when reading matchup_screen_v2.dart</text:span></text:p>
      <text:p text:style-name="Horizontal_20_Line"/>
      <text:h text:style-name="Heading_20_2" text:outline-level="2">Causa real</text:h>
      <text:list text:style-name="L8">
        <text:list-item>
          <text:p text:style-name="P9">imports incorrectos,</text:p>
        </text:list-item>
        <text:list-item>
          <text:p text:style-name="P9"><text:soft-page-break/>nombres inconsistentes,</text:p>
        </text:list-item>
        <text:list-item>
          <text:p text:style-name="P9">archivo V2 borrado parcialmente,</text:p>
        </text:list-item>
        <text:list-item>
          <text:p text:style-name="P9">referencias huérfanas.</text:p>
        </text:list-item>
      </text:list>
      <text:p text:style-name="Horizontal_20_Line"/>
      <text:h text:style-name="Heading_20_1" text:outline-level="1">🧠 Lección importante</text:h>
      <text:p text:style-name="Text_20_body">Flutter es MUY sensible a:</text:p>
      <text:list text:style-name="L9">
        <text:list-item>
          <text:p text:style-name="P10">nombres exactos,</text:p>
        </text:list-item>
        <text:list-item>
          <text:p text:style-name="P10">imports,</text:p>
        </text:list-item>
        <text:list-item>
          <text:p text:style-name="P10">mayúsculas/minúsculas,</text:p>
        </text:list-item>
        <text:list-item>
          <text:p text:style-name="P10">estructura de archivos.</text:p>
        </text:list-item>
      </text:list>
      <text:p text:style-name="Horizontal_20_Line"/>
      <text:h text:style-name="Heading_20_1" text:outline-level="1">🔧 Cómo se solucionó</text:h>
      <text:p text:style-name="Text_20_body">Finalmente:</text:p>
      <text:list text:style-name="L10">
        <text:list-item>
          <text:p text:style-name="P11">se eliminó la referencia V2,</text:p>
        </text:list-item>
        <text:list-item>
          <text:p text:style-name="P11">se restauró:</text:p>
        </text:list-item>
      </text:list>
      <text:p text:style-name="P4"><text:span text:style-name="Source_20_Text">import 'matchup_screen.dart';</text:span></text:p>
      <text:p text:style-name="Text_20_body">y se volvió a una única pantalla estable.</text:p>
      <text:p text:style-name="Horizontal_20_Line"/>
      <text:h text:style-name="Heading_20_1" text:outline-level="1">🧠 Aprendizaje importante</text:h>
      <text:p text:style-name="Text_20_body">Apareció una filosofía que probablemente marcará el proyecto:</text:p>
      <text:h text:style-name="Heading_20_2" text:outline-level="2">NO destruir versiones estables.</text:h>
      <text:p text:style-name="Text_20_body">En lugar de:</text:p>
      <text:list text:style-name="L11">
        <text:list-item>
          <text:p text:style-name="P12">sobreescribir agresivamente,</text:p>
        </text:list-item>
        <text:list-item>
          <text:p text:style-name="P12">experimentar encima de producción,</text:p>
        </text:list-item>
      </text:list>
      <text:p text:style-name="Text_20_body">se entendió la importancia de:</text:p>
      <text:list text:style-name="L12">
        <text:list-item>
          <text:p text:style-name="P13">checkpoints,</text:p>
        </text:list-item>
        <text:list-item>
          <text:p text:style-name="P13">ramas mentales,</text:p>
        </text:list-item>
        <text:list-item>
          <text:p text:style-name="P13">estabilidad incremental.</text:p>
        </text:list-item>
      </text:list>
      <text:p text:style-name="Horizontal_20_Line"/>
      <text:h text:style-name="Heading_20_1" text:outline-level="1"><text:soft-page-break/>🌐 Git y GitHub — El gran salto del día</text:h>
      <text:p text:style-name="Text_20_body">Este fue probablemente:</text:p>
      <text:h text:style-name="Heading_20_1" text:outline-level="1">el cambio más importante técnicamente.</text:h>
      <text:p text:style-name="Horizontal_20_Line"/>
      <text:h text:style-name="Heading_20_1" text:outline-level="1">🚀 Proceso realizado</text:h>
      <text:h text:style-name="Heading_20_2" text:outline-level="2">Inicialización Git</text:h>
      <text:p text:style-name="P4"><text:span text:style-name="Source_20_Text">git init</text:span></text:p>
      <text:p text:style-name="Horizontal_20_Line"/>
      <text:h text:style-name="Heading_20_2" text:outline-level="2">Primer bloqueo</text:h>
      <text:p text:style-name="Text_20_body">Git no permitía commit:</text:p>
      <text:p text:style-name="P4"><text:span text:style-name="Source_20_Text">Author identity unknown</text:span></text:p>
      <text:p text:style-name="Horizontal_20_Line"/>
      <text:h text:style-name="Heading_20_1" text:outline-level="1">🔧 Solución</text:h>
      <text:p text:style-name="Text_20_body">Configuración global:</text:p>
      <text:p text:style-name="Preformatted_20_Text"><text:span text:style-name="Source_20_Text">git config --global user.name "Daniel Alvarez"</text:span></text:p>
      <text:p text:style-name="P4"><text:span text:style-name="Source_20_Text">git config --global user.email "..."</text:span></text:p>
      <text:p text:style-name="Horizontal_20_Line"/>
      <text:h text:style-name="Heading_20_1" text:outline-level="1">🚀 Primer commit real</text:h>
      <text:p text:style-name="P4"><text:span text:style-name="Source_20_Text">git commit -m "Initial stable version of EuroLeague Insight"</text:span></text:p>
      <text:p text:style-name="Horizontal_20_Line"/>
      <text:h text:style-name="Heading_20_1" text:outline-level="1">🧠 Momento importante</text:h>
      <text:p text:style-name="Text_20_body">Aquí ocurrió algo muy relevante psicológicamente:</text:p>
      <text:p text:style-name="Text_20_body">La app dejó de ser:</text:p>
      <text:p text:style-name="P4"><text:span text:style-name="Source_20_Text">“código local”</text:span></text:p>
      <text:p text:style-name="Text_20_body">y pasó a ser:</text:p>
      <text:h text:style-name="Heading_20_1" text:outline-level="1"><text:soft-page-break/>un proyecto con historial real.</text:h>
      <text:p text:style-name="Horizontal_20_Line"/>
      <text:h text:style-name="Heading_20_1" text:outline-level="1">🌐 Subida a GitHub</text:h>
      <text:h text:style-name="Heading_20_2" text:outline-level="2">Problema encontrado</text:h>
      <text:p text:style-name="P4"><text:span text:style-name="Source_20_Text">src refspec main does not match any</text:span></text:p>
      <text:p text:style-name="Horizontal_20_Line"/>
      <text:h text:style-name="Heading_20_1" text:outline-level="1">Causa</text:h>
      <text:p text:style-name="Text_20_body">No existía todavía ningún commit válido.</text:p>
      <text:p text:style-name="Horizontal_20_Line"/>
      <text:h text:style-name="Heading_20_1" text:outline-level="1">🔧 Solución</text:h>
      <text:p text:style-name="Text_20_body">Crear commit correctamente y repetir push.</text:p>
      <text:p text:style-name="Horizontal_20_Line"/>
      <text:h text:style-name="Heading_20_1" text:outline-level="1">🚨 Segundo gran bloqueo — Merge y Vim</text:h>
      <text:p text:style-name="Text_20_body">GitHub tenía un README remoto inicial y Git detectó:</text:p>
      <text:list text:style-name="L13">
        <text:list-item>
          <text:p text:style-name="P14">historiales distintos,</text:p>
        </text:list-item>
        <text:list-item>
          <text:p text:style-name="P14">necesidad de merge.</text:p>
        </text:list-item>
      </text:list>
      <text:p text:style-name="Horizontal_20_Line"/>
      <text:h text:style-name="Heading_20_2" text:outline-level="2">Error:</text:h>
      <text:p text:style-name="P4"><text:span text:style-name="Source_20_Text">Updates were rejected because the remote contains work that you do not have locally</text:span></text:p>
      <text:p text:style-name="Horizontal_20_Line"/>
      <text:h text:style-name="Heading_20_1" text:outline-level="1">🔧 Solución</text:h>
      <text:p text:style-name="P4"><text:span text:style-name="Source_20_Text">git pull origin main --allow-unrelated-histories</text:span></text:p>
      <text:p text:style-name="Horizontal_20_Line"/>
      <text:h text:style-name="Heading_20_1" text:outline-level="1"><text:soft-page-break/>😄 El momento “Vim”</text:h>
      <text:p text:style-name="Text_20_body">Git abrió:</text:p>
      <text:h text:style-name="Heading_20_1" text:outline-level="1">Vim.</text:h>
      <text:p text:style-name="Text_20_body">Primera experiencia real con:</text:p>
      <text:list text:style-name="L14">
        <text:list-item>
          <text:p text:style-name="P15"><text:span text:style-name="Source_20_Text">ESC</text:span></text:p>
        </text:list-item>
        <text:list-item>
          <text:p text:style-name="P15"><text:span text:style-name="Source_20_Text">:wq</text:span></text:p>
        </text:list-item>
        <text:list-item>
          <text:p text:style-name="P15">cerrar editor terminal.</text:p>
        </text:list-item>
      </text:list>
      <text:p text:style-name="Horizontal_20_Line"/>
      <text:h text:style-name="Heading_20_1" text:outline-level="1">🧠 Aprendizaje enorme</text:h>
      <text:p text:style-name="Text_20_body">Git dejó de ser:</text:p>
      <text:p text:style-name="P4"><text:span text:style-name="Source_20_Text">“algo abstracto”</text:span></text:p>
      <text:p text:style-name="Text_20_body">y pasó a convertirse en:</text:p>
      <text:h text:style-name="Heading_20_1" text:outline-level="1">herramienta real de seguridad y recuperación.</text:h>
      <text:p text:style-name="Horizontal_20_Line"/>
      <text:h text:style-name="Heading_20_1" text:outline-level="1">📱 Primera APK real instalada en móvil</text:h>
      <text:p text:style-name="Text_20_body">Se generó build release:</text:p>
      <text:p text:style-name="P4"><text:span text:style-name="Source_20_Text">flutter build apk</text:span></text:p>
      <text:p text:style-name="Horizontal_20_Line"/>
      <text:h text:style-name="Heading_20_1" text:outline-level="1">🚀 Resultado</text:h>
      <text:p text:style-name="Text_20_body">Primera instalación real en Android.</text:p>
      <text:p text:style-name="Text_20_body">Y aquí ocurrió algo MUY importante:</text:p>
      <text:h text:style-name="Heading_20_2" text:outline-level="2">La app:</text:h>
      <text:h text:style-name="Heading_20_1" text:outline-level="1">se veía realmente bien.</text:h>
      <text:p text:style-name="Text_20_body">Especialmente:</text:p>
      <text:list text:style-name="L15">
        <text:list-item>
          <text:p text:style-name="P16">icono,</text:p>
        </text:list-item>
        <text:list-item>
          <text:p text:style-name="P16"><text:soft-page-break/>branding,</text:p>
        </text:list-item>
        <text:list-item>
          <text:p text:style-name="P16">cards,</text:p>
        </text:list-item>
        <text:list-item>
          <text:p text:style-name="P16">MatchUp,</text:p>
        </text:list-item>
        <text:list-item>
          <text:p text:style-name="P16">porcentajes.</text:p>
        </text:list-item>
      </text:list>
      <text:p text:style-name="Horizontal_20_Line"/>
      <text:h text:style-name="Heading_20_1" text:outline-level="1">🎨 Rediseño profundo de Win Probability</text:h>
      <text:h text:style-name="Heading_20_2" text:outline-level="2">Problema original</text:h>
      <text:p text:style-name="Text_20_body">El layout inicial:</text:p>
      <text:list text:style-name="L16">
        <text:list-item>
          <text:p text:style-name="P17">rompía líneas,</text:p>
        </text:list-item>
        <text:list-item>
          <text:p text:style-name="P17">tenía demasiada información textual,</text:p>
        </text:list-item>
        <text:list-item>
          <text:p text:style-name="P17">y los porcentajes no eran protagonistas.</text:p>
        </text:list-item>
      </text:list>
      <text:p text:style-name="Horizontal_20_Line"/>
      <text:h text:style-name="Heading_20_1" text:outline-level="1">🧠 Insight UX clave</text:h>
      <text:p text:style-name="Text_20_body">No hacía falta repetir nombres de equipos:</text:p>
      <text:list text:style-name="L17">
        <text:list-item>
          <text:p text:style-name="P18">los logos ya cumplían esa función.</text:p>
        </text:list-item>
      </text:list>
      <text:p text:style-name="Horizontal_20_Line"/>
      <text:h text:style-name="Heading_20_1" text:outline-level="1">🚀 Nuevo diseño implementado</text:h>
      <text:p text:style-name="Text_20_body">Se sustituyó:</text:p>
      <text:p text:style-name="Preformatted_20_Text"><text:span text:style-name="Source_20_Text">Real Madrid 64%</text:span></text:p>
      <text:p text:style-name="P4"><text:span text:style-name="Source_20_Text">Fenerbahce 36%</text:span></text:p>
      <text:p text:style-name="Text_20_body">por:</text:p>
      <text:p text:style-name="P4"><text:span text:style-name="Source_20_Text">64% <text:s text:c="4"/>36%</text:span></text:p>
      <text:p text:style-name="Horizontal_20_Line"/>
      <text:h text:style-name="Heading_20_1" text:outline-level="1">🔧 Cambios específicos</text:h>
      <text:h text:style-name="Heading_20_2" text:outline-level="2">Nuevo layout Row + Column</text:h>
      <text:p text:style-name="Text_20_body">Se implementó:</text:p>
      <text:p text:style-name="Preformatted_20_Text"><text:span text:style-name="Source_20_Text">Row(</text:span></text:p>
      <text:p text:style-name="Preformatted_20_Text"><text:span text:style-name="Source_20_Text"><text:s text:c="2"/>mainAxisAlignment: MainAxisAlignment.spaceEvenly,</text:span></text:p>
      <text:p text:style-name="P4"><text:soft-page-break/><text:span text:style-name="Source_20_Text">)</text:span></text:p>
      <text:p text:style-name="Text_20_body">con:</text:p>
      <text:list text:style-name="L18">
        <text:list-item>
          <text:p text:style-name="P19">columnas HOME/AWAY,</text:p>
        </text:list-item>
        <text:list-item>
          <text:p text:style-name="P19">porcentajes gigantes,</text:p>
        </text:list-item>
        <text:list-item>
          <text:p text:style-name="P19">separación visual central.</text:p>
        </text:list-item>
      </text:list>
      <text:p text:style-name="Horizontal_20_Line"/>
      <text:h text:style-name="Heading_20_1" text:outline-level="1">🎯 Resultado</text:h>
      <text:p text:style-name="Text_20_body">Mucho más:</text:p>
      <text:list text:style-name="L19">
        <text:list-item>
          <text:p text:style-name="P20">moderno,</text:p>
        </text:list-item>
        <text:list-item>
          <text:p text:style-name="P20">limpio,</text:p>
        </text:list-item>
        <text:list-item>
          <text:p text:style-name="P20">premium,</text:p>
        </text:list-item>
        <text:list-item>
          <text:p text:style-name="P20">mobile-first.</text:p>
        </text:list-item>
      </text:list>
      <text:p text:style-name="Horizontal_20_Line"/>
      <text:h text:style-name="Heading_20_1" text:outline-level="1">🧠 Cambio conceptual importante</text:h>
      <text:p text:style-name="Text_20_body">Aquí apareció otro salto mental:</text:p>
      <text:h text:style-name="Heading_20_2" text:outline-level="2">Antes:</text:h>
      <text:p text:style-name="P4"><text:span text:style-name="Source_20_Text">“mostrar datos”</text:span></text:p>
      <text:h text:style-name="Heading_20_2" text:outline-level="2">Ahora:</text:h>
      <text:p text:style-name="P4"><text:span text:style-name="Source_20_Text">“crear jerarquía visual”</text:span></text:p>
      <text:p text:style-name="Horizontal_20_Line"/>
      <text:h text:style-name="Heading_20_1" text:outline-level="1">⚙️ Primer sistema de insights dinámicos</text:h>
      <text:h text:style-name="Heading_20_2" text:outline-level="2">Antes</text:h>
      <text:p text:style-name="Text_20_body">Texto hardcodeado:</text:p>
      <text:p text:style-name="P4"><text:span text:style-name="Source_20_Text">'Team arrives with better offensive efficiency'</text:span></text:p>
      <text:p text:style-name="Horizontal_20_Line"/>
      <text:h text:style-name="Heading_20_1" text:outline-level="1"><text:soft-page-break/>Después</text:h>
      <text:p text:style-name="Text_20_body">Sistema dinámico:</text:p>
      <text:p text:style-name="P4"><text:span text:style-name="Source_20_Text">_getInsight(homeStanding, awayStanding)</text:span></text:p>
      <text:p text:style-name="Horizontal_20_Line"/>
      <text:h text:style-name="Heading_20_1" text:outline-level="1">🔧 Nueva función creada</text:h>
      <text:p text:style-name="P4"><text:span text:style-name="Source_20_Text">String _getInsight(...)</text:span></text:p>
      <text:p text:style-name="Horizontal_20_Line"/>
      <text:h text:style-name="Heading_20_1" text:outline-level="1">🚀 Resultado</text:h>
      <text:p text:style-name="Text_20_body">La UI empezó a reaccionar:</text:p>
      <text:h text:style-name="Heading_20_1" text:outline-level="1">según datos.</text:h>
      <text:p text:style-name="Horizontal_20_Line"/>
      <text:h text:style-name="Heading_20_1" text:outline-level="1">🧠 Este fue probablemente:</text:h>
      <text:h text:style-name="Heading_20_1" text:outline-level="1">el salto técnico más importante del día.</text:h>
      <text:p text:style-name="Text_20_body">Porque:</text:p>
      <text:list text:style-name="L20">
        <text:list-item>
          <text:p text:style-name="P21">lógica y UI quedaron separadas,</text:p>
        </text:list-item>
        <text:list-item>
          <text:p text:style-name="P21">la app empezó a comportarse dinámicamente,</text:p>
        </text:list-item>
        <text:list-item>
          <text:p text:style-name="P21">y se preparó la arquitectura para APIs reales.</text:p>
        </text:list-item>
      </text:list>
      <text:p text:style-name="Horizontal_20_Line"/>
      <text:h text:style-name="Heading_20_1" text:outline-level="1">📊 Interpretación contextual de estadísticas</text:h>
      <text:h text:style-name="Heading_20_2" text:outline-level="2">Problema detectado</text:h>
      <text:p text:style-name="Text_20_body">La lógica inicial decía:</text:p>
      <text:p text:style-name="P4"><text:span text:style-name="Source_20_Text">más alto = verde</text:span></text:p>
      <text:p text:style-name="Text_20_body">para TODAS las estadísticas.</text:p>
      <text:p text:style-name="Horizontal_20_Line"/>
      <text:h text:style-name="Heading_20_1" text:outline-level="1"><text:soft-page-break/>❌ Error conceptual</text:h>
      <text:p text:style-name="Text_20_body">En:</text:p>
      <text:list text:style-name="L21">
        <text:list-item>
          <text:p text:style-name="P22">LOSSES,</text:p>
        </text:list-item>
        <text:list-item>
          <text:p text:style-name="P22">POINTS AGAINST,</text:p>
        </text:list-item>
        <text:list-item>
          <text:p text:style-name="P22">DEF RTG,</text:p>
        </text:list-item>
      </text:list>
      <text:p text:style-name="Text_20_body">menos es mejor.</text:p>
      <text:p text:style-name="Horizontal_20_Line"/>
      <text:h text:style-name="Heading_20_1" text:outline-level="1">🚀 Solución implementada</text:h>
      <text:p text:style-name="Text_20_body">Nuevo parámetro:</text:p>
      <text:p text:style-name="P4"><text:span text:style-name="Source_20_Text">bool lowerIsBetter</text:span></text:p>
      <text:p text:style-name="Horizontal_20_Line"/>
      <text:h text:style-name="Heading_20_1" text:outline-level="1">🧠 Esto fue MUY importante</text:h>
      <text:p text:style-name="Text_20_body">Porque:</text:p>
      <text:h text:style-name="Heading_20_1" text:outline-level="1">la app empezó a interpretar métricas.</text:h>
      <text:p text:style-name="Text_20_body">No solo mostrarlas.</text:p>
      <text:p text:style-name="Horizontal_20_Line"/>
      <text:h text:style-name="Heading_20_1" text:outline-level="1">📱 UX móvil real y polishing</text:h>
      <text:p text:style-name="Text_20_body">Una vez instalada la APK:</text:p>
      <text:h text:style-name="Heading_20_1" text:outline-level="1">empezaron a aparecer problemas reales.</text:h>
      <text:p text:style-name="Horizontal_20_Line"/>
      <text:h text:style-name="Heading_20_1" text:outline-level="1">Problemas encontrados</text:h>
      <text:h text:style-name="Heading_20_2" text:outline-level="2">1.</text:h>
      <text:p text:style-name="Text_20_body">Cards demasiado altas.</text:p>
      <text:h text:style-name="Heading_20_2" text:outline-level="2"><text:soft-page-break/>2.</text:h>
      <text:p text:style-name="Text_20_body">Texto inferior oculto por Android navigation bar.</text:p>
      <text:h text:style-name="Heading_20_2" text:outline-level="2">3.</text:h>
      <text:p text:style-name="Text_20_body">Overflow:</text:p>
      <text:p text:style-name="P4"><text:span text:style-name="Source_20_Text">A RenderFlex overflowed by 9 pixels</text:span></text:p>
      <text:p text:style-name="Horizontal_20_Line"/>
      <text:h text:style-name="Heading_20_1" text:outline-level="1">🔧 Soluciones implementadas</text:h>
      <text:h text:style-name="Heading_20_2" text:outline-level="2">Compactación vertical</text:h>
      <text:p text:style-name="Text_20_body">Cambios específicos:</text:p>
      <text:p text:style-name="P4"><text:span text:style-name="Source_20_Text">height: 190 → 135</text:span></text:p>
      <text:p text:style-name="Horizontal_20_Line"/>
      <text:p text:style-name="P4"><text:span text:style-name="Source_20_Text">padding: 20 → 10</text:span></text:p>
      <text:p text:style-name="Horizontal_20_Line"/>
      <text:p text:style-name="P4"><text:span text:style-name="Source_20_Text">SizedBox(height: 25) → 8</text:span></text:p>
      <text:p text:style-name="Horizontal_20_Line"/>
      <text:p text:style-name="P4"><text:span text:style-name="Source_20_Text">fontSize: 32 → 24</text:span></text:p>
      <text:p text:style-name="Horizontal_20_Line"/>
      <text:h text:style-name="Heading_20_1" text:outline-level="1">🚀 SafeArea</text:h>
      <text:p text:style-name="Text_20_body">Se introdujo:</text:p>
      <text:p text:style-name="P4"><text:span text:style-name="Source_20_Text">SafeArea(</text:span></text:p>
      <text:p text:style-name="Text_20_body">para proteger contenido de:</text:p>
      <text:list text:style-name="L22">
        <text:list-item>
          <text:p text:style-name="P23">navigation bar,</text:p>
        </text:list-item>
        <text:list-item>
          <text:p text:style-name="P23">gestures Android,</text:p>
        </text:list-item>
        <text:list-item>
          <text:p text:style-name="P23">safe insets.</text:p>
        </text:list-item>
      </text:list>
      <text:p text:style-name="Horizontal_20_Line"/>
      <text:h text:style-name="Heading_20_1" text:outline-level="1">🧠 Aprendizaje importante</text:h>
      <text:p text:style-name="Text_20_body">El testing en móvil real:</text:p>
      <text:h text:style-name="Heading_20_1" text:outline-level="1"><text:soft-page-break/>cambia completamente la percepción de UX.</text:h>
      <text:p text:style-name="Text_20_body">Lo que parecía bien en emulador:</text:p>
      <text:list text:style-name="L23">
        <text:list-item>
          <text:p text:style-name="P24">no siempre funciona en dispositivo real.</text:p>
        </text:list-item>
      </text:list>
      <text:p text:style-name="Horizontal_20_Line"/>
      <text:h text:style-name="Heading_20_1" text:outline-level="1">🎨 Refinamiento final de colores</text:h>
      <text:h text:style-name="Heading_20_2" text:outline-level="2">Cambio importante</text:h>
      <text:p text:style-name="Text_20_body">Se decidió:</text:p>
      <text:list text:style-name="L24">
        <text:list-item>
          <text:p text:style-name="P25">mantener naranja como color protagonista.</text:p>
        </text:list-item>
      </text:list>
      <text:p text:style-name="Horizontal_20_Line"/>
      <text:h text:style-name="Heading_20_1" text:outline-level="1">Resultado final</text:h>
      <text:h text:style-name="Heading_20_2" text:outline-level="2">Naranja:</text:h>
      <text:list text:style-name="L25">
        <text:list-item>
          <text:p text:style-name="P26">HOME / AWAY</text:p>
        </text:list-item>
        <text:list-item>
          <text:p text:style-name="P26">WINS / LOSSES</text:p>
        </text:list-item>
        <text:list-item>
          <text:p text:style-name="P26">porcentajes</text:p>
        </text:list-item>
      </text:list>
      <text:h text:style-name="Heading_20_2" text:outline-level="2">Gris suave:</text:h>
      <text:list text:style-name="L26">
        <text:list-item>
          <text:p text:style-name="P27">insight inferior</text:p>
        </text:list-item>
      </text:list>
      <text:p text:style-name="Horizontal_20_Line"/>
      <text:h text:style-name="Heading_20_1" text:outline-level="1">🧠 Resultado visual</text:h>
      <text:p text:style-name="Text_20_body">La app empezó a tener:</text:p>
      <text:h text:style-name="Heading_20_1" text:outline-level="1">identidad visual coherente y reconocible.</text:h>
      <text:p text:style-name="Horizontal_20_Line"/>
      <text:h text:style-name="Heading_20_1" text:outline-level="1"><text:soft-page-break/>🚀 Estado final del Día 4</text:h>
      <text:h text:style-name="Heading_20_2" text:outline-level="2">Ya existe:</text:h>
      <text:p text:style-name="Text_20_body">✅ branding sólido<text:line-break/>✅ GitHub profesional<text:line-break/>✅ APK real instalada<text:line-break/>✅ arquitectura escalable<text:line-break/>✅ lógica dinámica<text:line-break/>✅ interpretación contextual stats<text:line-break/>✅ UX móvil refinada<text:line-break/>✅ workflow Git real<text:line-break/>✅ experiencia analytics moderna</text:p>
      <text:p text:style-name="Horizontal_20_Line"/>
      <text:h text:style-name="Heading_20_1" text:outline-level="1">🧠 Conclusión final</text:h>
      <text:p text:style-name="Text_20_body">Hoy el proyecto dejó definitivamente de sentirse como:</text:p>
      <text:p text:style-name="P4"><text:span text:style-name="Source_20_Text">“una práctica Flutter”</text:span></text:p>
      <text:p text:style-name="Text_20_body">y empezó a sentirse como:</text:p>
      <text:h text:style-name="Heading_20_1" text:outline-level="1">una aplicación deportiva moderna con potencial real.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4:40:20.610698800</meta:creation-date>
    <dc:date>2026-05-20T14:40:30.135675400</dc:date>
    <meta:editing-duration>PT12S</meta:editing-duration>
    <meta:editing-cycles>1</meta:editing-cycles>
    <meta:document-statistic meta:table-count="0" meta:image-count="0" meta:object-count="0" meta:page-count="14" meta:paragraph-count="277" meta:word-count="1096" meta:character-count="6819" meta:non-whitespace-character-count="6065"/>
    <meta:generator>LibreOffice/26.2.3.2$Windows_X86_64 LibreOffice_project/70e089b17412e4cb7773e41413306b17a2328c34</meta:generator>
  </office:meta>
</office:document-meta>
</file>