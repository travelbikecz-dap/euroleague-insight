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ario de Desarrollo – EuroLeague Insight</text:h>
      <text:h text:style-name="Heading_20_2" text:outline-level="2">Día 5 — Navegación avanzada, arquitectura analytics y Team Detail Dashboard</text:h>
      <text:p text:style-name="Text_20_body">Hoy ha sido probablemente uno de los días MÁS importantes del proyecto hasta ahora. No solo por la cantidad de código añadido, sino porque la aplicación ha empezado a transformarse de una simple demo Flutter a una estructura real de producto analytics deportivo.</text:p>
      <text:p text:style-name="Text_20_body">La evolución principal del día ha sido pasar de pantallas independientes a una arquitectura conectada y escalable, con navegación jerárquica, dashboards compactos de estadísticas y una identidad visual mucho más definida.</text:p>
      <text:p text:style-name="Horizontal_20_Line"/>
      <text:h text:style-name="Heading_20_1" text:outline-level="1">1. Mejora de navegación principal de la app</text:h>
      <text:h text:style-name="Heading_20_2" text:outline-level="2">Objetivo</text:h>
      <text:p text:style-name="Text_20_body">Mejorar la experiencia móvil para que la navegación entre:</text:p>
      <text:list text:style-name="L1">
        <text:list-item>
          <text:p text:style-name="P1">Games</text:p>
        </text:list-item>
        <text:list-item>
          <text:p text:style-name="P1">Standings</text:p>
        </text:list-item>
        <text:list-item>
          <text:p text:style-name="P1">Teams</text:p>
        </text:list-item>
      </text:list>
      <text:p text:style-name="Text_20_body">fuese más fluida y moderna.</text:p>
      <text:p text:style-name="Horizontal_20_Line"/>
      <text:h text:style-name="Heading_20_2" text:outline-level="2">Implementación</text:h>
      <text:p text:style-name="Text_20_body">Se sustituyó el sistema básico:</text:p>
      <text:p text:style-name="P2"><text:span text:style-name="Source_20_Text">body: _screens[_selectedIndex]</text:span></text:p>
      <text:p text:style-name="Text_20_body">por una arquitectura basada en:</text:p>
      <text:p text:style-name="P2"><text:span text:style-name="Source_20_Text">PageView</text:span></text:p>
      <text:p text:style-name="Text_20_body">junto con:</text:p>
      <text:p text:style-name="P2"><text:span text:style-name="Source_20_Text">PageController</text:span></text:p>
      <text:p text:style-name="Horizontal_20_Line"/>
      <text:h text:style-name="Heading_20_2" text:outline-level="2"><text:soft-page-break/>Funcionalidades añadidas</text:h>
      <text:h text:style-name="Heading_20_3" text:outline-level="3">Swipe horizontal entre pantallas</text:h>
      <text:p text:style-name="Text_20_body">El usuario ahora puede desplazarse lateralmente entre tabs utilizando gestos táctiles.</text:p>
      <text:p text:style-name="Horizontal_20_Line"/>
      <text:h text:style-name="Heading_20_3" text:outline-level="3">Sincronización BottomNavigationBar ↔ PageView</text:h>
      <text:p text:style-name="Text_20_body">Se implementó:</text:p>
      <text:p text:style-name="P2"><text:span text:style-name="Source_20_Text">onPageChanged</text:span></text:p>
      <text:p text:style-name="Text_20_body">y:</text:p>
      <text:p text:style-name="P2"><text:span text:style-name="Source_20_Text">_pageController.animateToPage()</text:span></text:p>
      <text:p text:style-name="Text_20_body">para mantener:</text:p>
      <text:list text:style-name="L2">
        <text:list-item>
          <text:p text:style-name="P3">navegación inferior,</text:p>
        </text:list-item>
        <text:list-item>
          <text:p text:style-name="P3">swipe,</text:p>
        </text:list-item>
        <text:list-item>
          <text:p text:style-name="P3">índice seleccionado,</text:p>
        </text:list-item>
      </text:list>
      <text:p text:style-name="Text_20_body">totalmente sincronizados.</text:p>
      <text:p text:style-name="Horizontal_20_Line"/>
      <text:h text:style-name="Heading_20_2" text:outline-level="2">Resultado UX</text:h>
      <text:p text:style-name="Text_20_body">La aplicación pasó de sentirse como:</text:p>
      <text:list text:style-name="L3">
        <text:list-item>
          <text:p text:style-name="P4">pantallas independientes,</text:p>
        </text:list-item>
      </text:list>
      <text:p text:style-name="Text_20_body">a sentirse como:</text:p>
      <text:list text:style-name="L4">
        <text:list-item>
          <text:p text:style-name="P5">una app móvil moderna,</text:p>
        </text:list-item>
        <text:list-item>
          <text:p text:style-name="P5">fluida,</text:p>
        </text:list-item>
        <text:list-item>
          <text:p text:style-name="P5">mucho más nativa.</text:p>
        </text:list-item>
      </text:list>
      <text:p text:style-name="Horizontal_20_Line"/>
      <text:h text:style-name="Heading_20_1" text:outline-level="1">2. Creación del sistema Team Detail</text:h>
      <text:h text:style-name="Heading_20_2" text:outline-level="2">Objetivo</text:h>
      <text:p text:style-name="Text_20_body">Permitir:</text:p>
      <text:list text:style-name="L5">
        <text:list-item>
          <text:p text:style-name="P6">pulsar un equipo en standings,</text:p>
        </text:list-item>
        <text:list-item>
          <text:p text:style-name="P6">abrir una pantalla individual del equipo,</text:p>
        </text:list-item>
        <text:list-item>
          <text:p text:style-name="P6">mostrar analytics detalladas.</text:p>
        </text:list-item>
      </text:list>
      <text:p text:style-name="Horizontal_20_Line"><text:soft-page-break/></text:p>
      <text:h text:style-name="Heading_20_2" text:outline-level="2">Nueva pantalla creada</text:h>
      <text:p text:style-name="P2"><text:span text:style-name="Source_20_Text">team_detail_screen.dart</text:span></text:p>
      <text:p text:style-name="Horizontal_20_Line"/>
      <text:h text:style-name="Heading_20_2" text:outline-level="2">Arquitectura inicial</text:h>
      <text:p text:style-name="Text_20_body">La primera versión recibió únicamente:</text:p>
      <text:p text:style-name="P2"><text:span text:style-name="Source_20_Text">String teamName</text:span></text:p>
      <text:p text:style-name="Text_20_body">pero rápidamente se evolucionó a una arquitectura mucho más escalable:</text:p>
      <text:p text:style-name="P2"><text:span text:style-name="Source_20_Text">final TeamStats team;</text:span></text:p>
      <text:p text:style-name="Horizontal_20_Line"/>
      <text:h text:style-name="Heading_20_2" text:outline-level="2">Beneficios de esta decisión</text:h>
      <text:p text:style-name="Text_20_body">Ahora Team Detail puede reutilizar:</text:p>
      <text:list text:style-name="L6">
        <text:list-item>
          <text:p text:style-name="P7">logo,</text:p>
        </text:list-item>
        <text:list-item>
          <text:p text:style-name="P7">estadísticas,</text:p>
        </text:list-item>
        <text:list-item>
          <text:p text:style-name="P7">ratings,</text:p>
        </text:list-item>
        <text:list-item>
          <text:p text:style-name="P7">futuros datos de jugadores,</text:p>
        </text:list-item>
        <text:list-item>
          <text:p text:style-name="P7">tendencias,</text:p>
        </text:list-item>
        <text:list-item>
          <text:p text:style-name="P7">charts,</text:p>
        </text:list-item>
        <text:list-item>
          <text:p text:style-name="P7">datos API,</text:p>
        </text:list-item>
      </text:list>
      <text:p text:style-name="Text_20_body">sin rehacer navegación.</text:p>
      <text:p text:style-name="Horizontal_20_Line"/>
      <text:h text:style-name="Heading_20_1" text:outline-level="1">3. Navegación jerárquica real</text:h>
      <text:h text:style-name="Heading_20_2" text:outline-level="2">Implementación en Standings</text:h>
      <text:p text:style-name="Text_20_body">Se añadió:</text:p>
      <text:p text:style-name="P2"><text:span text:style-name="Source_20_Text">InkWell</text:span></text:p>
      <text:p text:style-name="Text_20_body">sobre cada fila de standings.</text:p>
      <text:p text:style-name="Horizontal_20_Line"/>
      <text:h text:style-name="Heading_20_2" text:outline-level="2"><text:soft-page-break/>Navegación implementada</text:h>
      <text:p text:style-name="Preformatted_20_Text"><text:span text:style-name="Source_20_Text">Navigator.push(</text:span></text:p>
      <text:p text:style-name="Preformatted_20_Text"><text:span text:style-name="Source_20_Text"><text:s text:c="2"/>context,</text:span></text:p>
      <text:p text:style-name="Preformatted_20_Text"><text:span text:style-name="Source_20_Text"><text:s text:c="2"/>MaterialPageRoute(</text:span></text:p>
      <text:p text:style-name="Preformatted_20_Text"><text:span text:style-name="Source_20_Text"><text:s text:c="4"/>builder: (context) =&gt; TeamDetailScreen(...)</text:span></text:p>
      <text:p text:style-name="Preformatted_20_Text"><text:span text:style-name="Source_20_Text"><text:s text:c="2"/>),</text:span></text:p>
      <text:p text:style-name="P2"><text:span text:style-name="Source_20_Text">);</text:span></text:p>
      <text:p text:style-name="Horizontal_20_Line"/>
      <text:h text:style-name="Heading_20_2" text:outline-level="2">Resultado</text:h>
      <text:p text:style-name="Text_20_body">La app ya tiene:</text:p>
      <text:p text:style-name="P2"><text:span text:style-name="Source_20_Text">Overview → Detail Navigation</text:span></text:p>
      <text:p text:style-name="Text_20_body">como aplicaciones deportivas reales.</text:p>
      <text:p text:style-name="Horizontal_20_Line"/>
      <text:h text:style-name="Heading_20_1" text:outline-level="1">4. Resolución de problemas de consistencia de datos</text:h>
      <text:h text:style-name="Heading_20_2" text:outline-level="2">Problema encontrado</text:h>
      <text:p text:style-name="Text_20_body">Los nombres de equipos entre:</text:p>
      <text:list text:style-name="L7">
        <text:list-item>
          <text:p text:style-name="P8">mockStandings</text:p>
        </text:list-item>
        <text:list-item>
          <text:p text:style-name="P8">mockTeamStats</text:p>
        </text:list-item>
      </text:list>
      <text:p text:style-name="Text_20_body">no coincidían exactamente.</text:p>
      <text:p text:style-name="Text_20_body">Ejemplos:</text:p>
      <text:list text:style-name="L8">
        <text:list-item>
          <text:p text:style-name="P9">Valencia vs Valencia Basket</text:p>
        </text:list-item>
        <text:list-item>
          <text:p text:style-name="P9">Bayern vs Bayern Munich</text:p>
        </text:list-item>
        <text:list-item>
          <text:p text:style-name="P9">Crvena vs Crvena Zvezda</text:p>
        </text:list-item>
      </text:list>
      <text:p text:style-name="Horizontal_20_Line"/>
      <text:h text:style-name="Heading_20_2" text:outline-level="2">Consecuencia</text:h>
      <text:p text:style-name="P2"><text:span text:style-name="Source_20_Text">firstWhere()</text:span></text:p>
      <text:p text:style-name="Text_20_body">fallaba y mostraba:</text:p>
      <text:list text:style-name="L9">
        <text:list-item>
          <text:p text:style-name="P10">errores rojos,</text:p>
        </text:list-item>
        <text:list-item>
          <text:p text:style-name="P10">equipos incorrectos,</text:p>
        </text:list-item>
        <text:list-item>
          <text:p text:style-name="P10">fallback al primer equipo.</text:p>
        </text:list-item>
      </text:list>
      <text:p text:style-name="Horizontal_20_Line"><text:soft-page-break/></text:p>
      <text:h text:style-name="Heading_20_2" text:outline-level="2">Solución</text:h>
      <text:p text:style-name="Text_20_body">Se unificaron manualmente los nombres entre datasets.</text:p>
      <text:p text:style-name="Horizontal_20_Line"/>
      <text:h text:style-name="Heading_20_2" text:outline-level="2">Aprendizaje importante</text:h>
      <text:p text:style-name="Text_20_body">Este fue uno de los primeros problemas reales de:</text:p>
      <text:list text:style-name="L10">
        <text:list-item>
          <text:p text:style-name="P11">consistencia de datos,</text:p>
        </text:list-item>
        <text:list-item>
          <text:p text:style-name="P11">relaciones entre modelos,</text:p>
        </text:list-item>
        <text:list-item>
          <text:p text:style-name="P11">integración entre datasets.</text:p>
        </text:list-item>
      </text:list>
      <text:p text:style-name="Text_20_body">Muy representativo de desarrollo real.</text:p>
      <text:p text:style-name="Horizontal_20_Line"/>
      <text:h text:style-name="Heading_20_1" text:outline-level="1">5. Evolución visual completa del Team Detail Dashboard</text:h>
      <text:h text:style-name="Heading_20_2" text:outline-level="2">Situación inicial</text:h>
      <text:p text:style-name="Text_20_body">Las estadísticas se mostraban como:</text:p>
      <text:list text:style-name="L11">
        <text:list-item>
          <text:p text:style-name="P12">cards grandes,</text:p>
        </text:list-item>
        <text:list-item>
          <text:p text:style-name="P12">mucho padding,</text:p>
        </text:list-item>
        <text:list-item>
          <text:p text:style-name="P12">baja densidad visual.</text:p>
        </text:list-item>
      </text:list>
      <text:p text:style-name="Text_20_body">El resultado era limpio, pero poco eficiente para analytics.</text:p>
      <text:p text:style-name="Horizontal_20_Line"/>
      <text:h text:style-name="Heading_20_2" text:outline-level="2">Decisión de UX</text:h>
      <text:p text:style-name="Text_20_body">Se tomó una decisión MUY importante:<text:line-break/>priorizar:</text:p>
      <text:list text:style-name="L12">
        <text:list-item>
          <text:p text:style-name="P13">densidad visual,</text:p>
        </text:list-item>
        <text:list-item>
          <text:p text:style-name="P13">escaneo rápido,</text:p>
        </text:list-item>
        <text:list-item>
          <text:p text:style-name="P13">sensación de dashboard analytics,</text:p>
        </text:list-item>
      </text:list>
      <text:p text:style-name="Text_20_body">sobre:</text:p>
      <text:list text:style-name="L13">
        <text:list-item>
          <text:p text:style-name="P14">cards enormes tipo “material demo”.</text:p>
        </text:list-item>
      </text:list>
      <text:p text:style-name="Horizontal_20_Line"/>
      <text:h text:style-name="Heading_20_1" text:outline-level="1"><text:soft-page-break/>6. Rediseño completo de estadísticas</text:h>
      <text:h text:style-name="Heading_20_2" text:outline-level="2">Cambios implementados</text:h>
      <text:h text:style-name="Heading_20_3" text:outline-level="3">Tamaño reducido de stat cards</text:h>
      <text:p text:style-name="Text_20_body">Se redujeron:</text:p>
      <text:list text:style-name="L14">
        <text:list-item>
          <text:p text:style-name="P15">width,</text:p>
        </text:list-item>
        <text:list-item>
          <text:p text:style-name="P15">padding,</text:p>
        </text:list-item>
        <text:list-item>
          <text:p text:style-name="P15">fontSize,</text:p>
        </text:list-item>
        <text:list-item>
          <text:p text:style-name="P15">spacing.</text:p>
        </text:list-item>
      </text:list>
      <text:p text:style-name="Horizontal_20_Line"/>
      <text:h text:style-name="Heading_20_2" text:outline-level="2">Valores modificados</text:h>
      <text:h text:style-name="Heading_20_3" text:outline-level="3">Antes</text:h>
      <text:p text:style-name="Preformatted_20_Text"><text:span text:style-name="Source_20_Text">width: 140</text:span></text:p>
      <text:p text:style-name="Preformatted_20_Text"><text:span text:style-name="Source_20_Text">padding: 16</text:span></text:p>
      <text:p text:style-name="P2"><text:span text:style-name="Source_20_Text">fontSize: 24</text:span></text:p>
      <text:p text:style-name="Horizontal_20_Line"/>
      <text:h text:style-name="Heading_20_3" text:outline-level="3">Después</text:h>
      <text:p text:style-name="Preformatted_20_Text"><text:span text:style-name="Source_20_Text">width: 78</text:span></text:p>
      <text:p text:style-name="Preformatted_20_Text"><text:span text:style-name="Source_20_Text">padding: 8</text:span></text:p>
      <text:p text:style-name="P2"><text:span text:style-name="Source_20_Text">fontSize: 16</text:span></text:p>
      <text:p text:style-name="Horizontal_20_Line"/>
      <text:h text:style-name="Heading_20_2" text:outline-level="2">Resultado</text:h>
      <text:p text:style-name="Text_20_body">La pantalla pasó de parecer:</text:p>
      <text:list text:style-name="L15">
        <text:list-item>
          <text:p text:style-name="P16">una colección de cards,</text:p>
        </text:list-item>
      </text:list>
      <text:p text:style-name="Text_20_body">a parecer:</text:p>
      <text:list text:style-name="L16">
        <text:list-item>
          <text:p text:style-name="P17">un dashboard analytics compacto,</text:p>
        </text:list-item>
        <text:list-item>
          <text:p text:style-name="P17">una herramienta de scouting,</text:p>
        </text:list-item>
        <text:list-item>
          <text:p text:style-name="P17">una app deportiva seria.</text:p>
        </text:list-item>
      </text:list>
      <text:p text:style-name="Horizontal_20_Line"/>
      <text:h text:style-name="Heading_20_1" text:outline-level="1">7. Nueva filosofía de producto descubierta</text:h>
      <text:p text:style-name="Text_20_body">Durante el día se definió claramente el enfoque visual del proyecto:</text:p>
      <text:h text:style-name="Heading_20_2" text:outline-level="2"><text:soft-page-break/>Objetivo UX</text:h>
      <text:p text:style-name="Text_20_body">Mostrar:</text:p>
      <text:list text:style-name="L17">
        <text:list-item>
          <text:p text:style-name="P18">20–28 métricas simultáneamente,</text:p>
        </text:list-item>
        <text:list-item>
          <text:p text:style-name="P18">sin scroll vertical excesivo,</text:p>
        </text:list-item>
        <text:list-item>
          <text:p text:style-name="P18">permitiendo escaneo rápido.</text:p>
        </text:list-item>
      </text:list>
      <text:p text:style-name="Horizontal_20_Line"/>
      <text:h text:style-name="Heading_20_2" text:outline-level="2">Concepto clave</text:h>
      <text:p text:style-name="Text_20_body">No construir:</text:p>
      <text:list text:style-name="L18">
        <text:list-item>
          <text:p text:style-name="P19">una hoja Excel móvil,</text:p>
        </text:list-item>
      </text:list>
      <text:p text:style-name="Text_20_body">ni tampoco:</text:p>
      <text:list text:style-name="L19">
        <text:list-item>
          <text:p text:style-name="P20">cards enormes simplificadas.</text:p>
        </text:list-item>
      </text:list>
      <text:p text:style-name="Horizontal_20_Line"/>
      <text:h text:style-name="Heading_20_2" text:outline-level="2">Sino</text:h>
      <text:p text:style-name="Text_20_body">Construir:</text:p>
      <text:h text:style-name="Heading_20_1" text:outline-level="1">“Compact Analytics Dashboard”</text:h>
      <text:p text:style-name="Horizontal_20_Line"/>
      <text:h text:style-name="Heading_20_1" text:outline-level="1">8. Recentrado visual del dashboard</text:h>
      <text:h text:style-name="Heading_20_2" text:outline-level="2">Problema detectado</text:h>
      <text:p text:style-name="Text_20_body">La grid de estadísticas:</text:p>
      <text:list text:style-name="L20">
        <text:list-item>
          <text:p text:style-name="P21">quedaba visualmente desplazada,</text:p>
        </text:list-item>
        <text:list-item>
          <text:p text:style-name="P21">con exceso de aire a la derecha.</text:p>
        </text:list-item>
      </text:list>
      <text:p text:style-name="Horizontal_20_Line"/>
      <text:h text:style-name="Heading_20_2" text:outline-level="2">Investigación UX</text:h>
      <text:p text:style-name="Text_20_body">Inicialmente se probó:</text:p>
      <text:p text:style-name="P2"><text:span text:style-name="Source_20_Text">WrapAlignment.center</text:span></text:p>
      <text:p text:style-name="Text_20_body">pero el problema real provenía de:</text:p>
      <text:list text:style-name="L21">
        <text:list-item>
          <text:p text:style-name="P22">la estructura del Column,</text:p>
        </text:list-item>
        <text:list-item>
          <text:p text:style-name="P22"><text:soft-page-break/>y el comportamiento del Wrap ocupando ancho completo.</text:p>
        </text:list-item>
      </text:list>
      <text:p text:style-name="Horizontal_20_Line"/>
      <text:h text:style-name="Heading_20_2" text:outline-level="2">Solución final</text:h>
      <text:p text:style-name="Text_20_body">El Wrap se envolvió dentro de:</text:p>
      <text:p text:style-name="Preformatted_20_Text"><text:span text:style-name="Source_20_Text">Center(</text:span></text:p>
      <text:p text:style-name="Preformatted_20_Text"><text:span text:style-name="Source_20_Text"><text:s text:c="2"/>child: Wrap(...)</text:span></text:p>
      <text:p text:style-name="P2"><text:span text:style-name="Source_20_Text">)</text:span></text:p>
      <text:p text:style-name="Horizontal_20_Line"/>
      <text:h text:style-name="Heading_20_2" text:outline-level="2">Resultado</text:h>
      <text:p text:style-name="Text_20_body">La pantalla quedó:</text:p>
      <text:list text:style-name="L22">
        <text:list-item>
          <text:p text:style-name="P23">equilibrada,</text:p>
        </text:list-item>
        <text:list-item>
          <text:p text:style-name="P23">centrada,</text:p>
        </text:list-item>
        <text:list-item>
          <text:p text:style-name="P23">mucho más profesional visualmente.</text:p>
        </text:list-item>
      </text:list>
      <text:p text:style-name="Horizontal_20_Line"/>
      <text:h text:style-name="Heading_20_1" text:outline-level="1">9. Escalabilidad analytics definida</text:h>
      <text:p text:style-name="Text_20_body">Se definió la estrategia futura de estadísticas:</text:p>
      <text:p text:style-name="Horizontal_20_Line"/>
      <text:h text:style-name="Heading_20_2" text:outline-level="2">Core stats</text:h>
      <text:p text:style-name="Text_20_body">Siempre visibles:</text:p>
      <text:list text:style-name="L23">
        <text:list-item>
          <text:p text:style-name="P24">PPG</text:p>
        </text:list-item>
        <text:list-item>
          <text:p text:style-name="P24">REB</text:p>
        </text:list-item>
        <text:list-item>
          <text:p text:style-name="P24">AST</text:p>
        </text:list-item>
        <text:list-item>
          <text:p text:style-name="P24">OFF RTG</text:p>
        </text:list-item>
        <text:list-item>
          <text:p text:style-name="P24">DEF RTG</text:p>
        </text:list-item>
        <text:list-item>
          <text:p text:style-name="P24">NET RTG</text:p>
        </text:list-item>
        <text:list-item>
          <text:p text:style-name="P24">PACE</text:p>
        </text:list-item>
      </text:list>
      <text:p text:style-name="Horizontal_20_Line"/>
      <text:h text:style-name="Heading_20_2" text:outline-level="2">Secondary stats</text:h>
      <text:p text:style-name="Text_20_body">Escalables:</text:p>
      <text:list text:style-name="L24">
        <text:list-item>
          <text:p text:style-name="P25">TS%</text:p>
        </text:list-item>
        <text:list-item>
          <text:p text:style-name="P25"><text:soft-page-break/>eFG%</text:p>
        </text:list-item>
        <text:list-item>
          <text:p text:style-name="P25">OREB</text:p>
        </text:list-item>
        <text:list-item>
          <text:p text:style-name="P25">DREB</text:p>
        </text:list-item>
        <text:list-item>
          <text:p text:style-name="P25">STL</text:p>
        </text:list-item>
        <text:list-item>
          <text:p text:style-name="P25">BLK</text:p>
        </text:list-item>
        <text:list-item>
          <text:p text:style-name="P25">AST/TOV</text:p>
        </text:list-item>
        <text:list-item>
          <text:p text:style-name="P25">FT%</text:p>
        </text:list-item>
        <text:list-item>
          <text:p text:style-name="P25">2P%</text:p>
        </text:list-item>
      </text:list>
      <text:p text:style-name="Horizontal_20_Line"/>
      <text:h text:style-name="Heading_20_2" text:outline-level="2">Future advanced context</text:h>
      <text:p text:style-name="Text_20_body">Más adelante:</text:p>
      <text:list text:style-name="L25">
        <text:list-item>
          <text:p text:style-name="P26">fatigue,</text:p>
        </text:list-item>
        <text:list-item>
          <text:p text:style-name="P26">domestic leagues,</text:p>
        </text:list-item>
        <text:list-item>
          <text:p text:style-name="P26">travel,</text:p>
        </text:list-item>
        <text:list-item>
          <text:p text:style-name="P26">injuries,</text:p>
        </text:list-item>
        <text:list-item>
          <text:p text:style-name="P26">clutch performance,</text:p>
        </text:list-item>
        <text:list-item>
          <text:p text:style-name="P26">matchup engines.</text:p>
        </text:list-item>
      </text:list>
      <text:p text:style-name="Horizontal_20_Line"/>
      <text:h text:style-name="Heading_20_1" text:outline-level="1">10. Debate estratégico sobre domestic leagues</text:h>
      <text:p text:style-name="Text_20_body">Se analizó profundamente:</text:p>
      <text:list text:style-name="L26">
        <text:list-item>
          <text:p text:style-name="P27">si incluir ligas nacionales,</text:p>
        </text:list-item>
        <text:list-item>
          <text:p text:style-name="P27">cómo afectan al rendimiento EuroLeague,</text:p>
        </text:list-item>
        <text:list-item>
          <text:p text:style-name="P27">rotaciones,</text:p>
        </text:list-item>
        <text:list-item>
          <text:p text:style-name="P27">descansos,</text:p>
        </text:list-item>
        <text:list-item>
          <text:p text:style-name="P27">fatiga.</text:p>
        </text:list-item>
      </text:list>
      <text:p text:style-name="Horizontal_20_Line"/>
      <text:h text:style-name="Heading_20_2" text:outline-level="2">Conclusión estratégica</text:h>
      <text:h text:style-name="Heading_20_3" text:outline-level="3">Fase actual:</text:h>
      <text:p text:style-name="Text_20_body">centrarse exclusivamente en:</text:p>
      <text:h text:style-name="Heading_20_1" text:outline-level="1"><text:soft-page-break/>EuroLeague.</text:h>
      <text:p text:style-name="Horizontal_20_Line"/>
      <text:h text:style-name="Heading_20_2" text:outline-level="2">Pero:</text:h>
      <text:p text:style-name="Text_20_body">preparar arquitectura escalable para:</text:p>
      <text:list text:style-name="L27">
        <text:list-item>
          <text:p text:style-name="P28">contexto externo,</text:p>
        </text:list-item>
        <text:list-item>
          <text:p text:style-name="P28">fatigue analytics,</text:p>
        </text:list-item>
        <text:list-item>
          <text:p text:style-name="P28">scheduling impact,</text:p>
        </text:list-item>
        <text:list-item>
          <text:p text:style-name="P28">domestic performance.</text:p>
        </text:list-item>
      </text:list>
      <text:p text:style-name="Horizontal_20_Line"/>
      <text:h text:style-name="Heading_20_1" text:outline-level="1">11. Reflexión importante del día</text:h>
      <text:p text:style-name="Text_20_body">Durante la sesión apareció una evolución MUY clara:<text:line-break/>el enfoque dejó de ser:</text:p>
      <text:p text:style-name="P2"><text:span text:style-name="Source_20_Text">“hacer pantallas Flutter”</text:span></text:p>
      <text:p text:style-name="Text_20_body">y empezó a convertirse en:</text:p>
      <text:p text:style-name="P2"><text:span text:style-name="Source_20_Text">“diseñar una herramienta analytics”</text:span></text:p>
      <text:p text:style-name="Horizontal_20_Line"/>
      <text:h text:style-name="Heading_20_1" text:outline-level="1">12. Tecnologías y conceptos trabajados hoy</text:h>
      <text:h text:style-name="Heading_20_2" text:outline-level="2">Flutter</text:h>
      <text:list text:style-name="L28">
        <text:list-item>
          <text:p text:style-name="P29">PageView</text:p>
        </text:list-item>
        <text:list-item>
          <text:p text:style-name="P29">PageController</text:p>
        </text:list-item>
        <text:list-item>
          <text:p text:style-name="P29">Navigator</text:p>
        </text:list-item>
        <text:list-item>
          <text:p text:style-name="P29">MaterialPageRoute</text:p>
        </text:list-item>
        <text:list-item>
          <text:p text:style-name="P29">InkWell</text:p>
        </text:list-item>
        <text:list-item>
          <text:p text:style-name="P29">Wrap</text:p>
        </text:list-item>
        <text:list-item>
          <text:p text:style-name="P29">Center</text:p>
        </text:list-item>
        <text:list-item>
          <text:p text:style-name="P29">SingleChildScrollView</text:p>
        </text:list-item>
        <text:list-item>
          <text:p text:style-name="P29">responsive layout</text:p>
        </text:list-item>
      </text:list>
      <text:p text:style-name="Horizontal_20_Line"/>
      <text:h text:style-name="Heading_20_2" text:outline-level="2"><text:soft-page-break/>Arquitectura</text:h>
      <text:list text:style-name="L29">
        <text:list-item>
          <text:p text:style-name="P30">reusable widgets</text:p>
        </text:list-item>
        <text:list-item>
          <text:p text:style-name="P30">model relationships</text:p>
        </text:list-item>
        <text:list-item>
          <text:p text:style-name="P30">dataset consistency</text:p>
        </text:list-item>
        <text:list-item>
          <text:p text:style-name="P30">navigation hierarchy</text:p>
        </text:list-item>
        <text:list-item>
          <text:p text:style-name="P30">scalable analytics design</text:p>
        </text:list-item>
      </text:list>
      <text:p text:style-name="Horizontal_20_Line"/>
      <text:h text:style-name="Heading_20_2" text:outline-level="2">UX/UI</text:h>
      <text:list text:style-name="L30">
        <text:list-item>
          <text:p text:style-name="P31">analytics density</text:p>
        </text:list-item>
        <text:list-item>
          <text:p text:style-name="P31">compact dashboard layout</text:p>
        </text:list-item>
        <text:list-item>
          <text:p text:style-name="P31">visual hierarchy</text:p>
        </text:list-item>
        <text:list-item>
          <text:p text:style-name="P31">mobile scanning patterns</text:p>
        </text:list-item>
        <text:list-item>
          <text:p text:style-name="P31">spacing optimization</text:p>
        </text:list-item>
        <text:list-item>
          <text:p text:style-name="P31">dashboard balancing</text:p>
        </text:list-item>
      </text:list>
      <text:p text:style-name="Horizontal_20_Line"/>
      <text:h text:style-name="Heading_20_1" text:outline-level="1">13. Estado actual del proyecto</text:h>
      <text:h text:style-name="Heading_20_2" text:outline-level="2">La app ya incluye:</text:h>
      <text:h text:style-name="Heading_20_3" text:outline-level="3">Navigation</text:h>
      <text:p text:style-name="Text_20_body">✅ Swipe tabs<text:line-break/>✅ Bottom navigation sincronizada<text:line-break/>✅ Team detail navigation</text:p>
      <text:p text:style-name="Horizontal_20_Line"/>
      <text:h text:style-name="Heading_20_3" text:outline-level="3">Screens</text:h>
      <text:p text:style-name="Text_20_body">✅ Games<text:line-break/>✅ Standings<text:line-break/>✅ Teams<text:line-break/>✅ Team Detail</text:p>
      <text:p text:style-name="Horizontal_20_Line"/>
      <text:h text:style-name="Heading_20_3" text:outline-level="3">Analytics</text:h>
      <text:p text:style-name="Text_20_body">✅ Advanced stats<text:line-break/>✅ Compact analytics dashboard<text:line-break/><text:soft-page-break/>✅ Team ratings<text:line-break/>✅ Team comparison base</text:p>
      <text:p text:style-name="Horizontal_20_Line"/>
      <text:h text:style-name="Heading_20_3" text:outline-level="3">Architecture</text:h>
      <text:p text:style-name="Text_20_body">✅ reusable models<text:line-break/>✅ linked datasets<text:line-break/>✅ scalable UI<text:line-break/>✅ modular screens</text:p>
      <text:p text:style-name="Horizontal_20_Line"/>
      <text:h text:style-name="Heading_20_1" text:outline-level="1">14. Próximos pasos definidos</text:h>
      <text:h text:style-name="Heading_20_2" text:outline-level="2">Prioridad inmediata</text:h>
      <text:h text:style-name="Heading_20_3" text:outline-level="3">Team Detail expansion</text:h>
      <text:list text:style-name="L31">
        <text:list-item>
          <text:p text:style-name="P32">24–28 estadísticas,</text:p>
        </text:list-item>
        <text:list-item>
          <text:p text:style-name="P32">mini analytics dashboard definitivo.</text:p>
        </text:list-item>
      </text:list>
      <text:p text:style-name="Horizontal_20_Line"/>
      <text:h text:style-name="Heading_20_2" text:outline-level="2">Después</text:h>
      <text:h text:style-name="Heading_20_3" text:outline-level="3">Roster system</text:h>
      <text:list text:style-name="L32">
        <text:list-item>
          <text:p text:style-name="P33">jugadores,</text:p>
        </text:list-item>
        <text:list-item>
          <text:p text:style-name="P33">player cards,</text:p>
        </text:list-item>
        <text:list-item>
          <text:p text:style-name="P33">player detail screens,</text:p>
        </text:list-item>
        <text:list-item>
          <text:p text:style-name="P33">fotos,</text:p>
        </text:list-item>
        <text:list-item>
          <text:p text:style-name="P33">estadísticas individuales.</text:p>
        </text:list-item>
      </text:list>
      <text:p text:style-name="Horizontal_20_Line"/>
      <text:h text:style-name="Heading_20_2" text:outline-level="2">Más adelante</text:h>
      <text:h text:style-name="Heading_20_3" text:outline-level="3">Context analytics</text:h>
      <text:list text:style-name="L33">
        <text:list-item>
          <text:p text:style-name="P34">domestic schedule,</text:p>
        </text:list-item>
        <text:list-item>
          <text:p text:style-name="P34">fatigue,</text:p>
        </text:list-item>
        <text:list-item>
          <text:p text:style-name="P34">injuries,</text:p>
        </text:list-item>
        <text:list-item>
          <text:p text:style-name="P34">prediction engine.</text:p>
        </text:list-item>
      </text:list>
      <text:p text:style-name="Horizontal_20_Line"/>
      <text:h text:style-name="Heading_20_1" text:outline-level="1"><text:soft-page-break/>Conclusión del día</text:h>
      <text:p text:style-name="Text_20_body">Hoy el proyecto ha dejado de sentirse como:</text:p>
      <text:list text:style-name="L34">
        <text:list-item>
          <text:p text:style-name="P35">una app Flutter experimental,</text:p>
        </text:list-item>
      </text:list>
      <text:p text:style-name="Text_20_body">y ha empezado a sentirse como:</text:p>
      <text:h text:style-name="Heading_20_1" text:outline-level="1">una plataforma analytics deportiva real.</text:h>
      <text:p text:style-name="Text_20_body">Especialmente importante:</text:p>
      <text:list text:style-name="L35">
        <text:list-item>
          <text:p text:style-name="P36">descubrimiento del lenguaje visual,</text:p>
        </text:list-item>
        <text:list-item>
          <text:p text:style-name="P36">densidad analytics compacta,</text:p>
        </text:list-item>
        <text:list-item>
          <text:p text:style-name="P36">navegación jerárquica,</text:p>
        </text:list-item>
        <text:list-item>
          <text:p text:style-name="P36">estructura escalable.</text:p>
        </text:list-item>
      </text:list>
      <text:p text:style-name="Text_20_body">El progreso del día ha sido enorme tanto a nivel:</text:p>
      <text:list text:style-name="L36">
        <text:list-item>
          <text:p text:style-name="P37">técnico,</text:p>
        </text:list-item>
        <text:list-item>
          <text:p text:style-name="P37">UX,</text:p>
        </text:list-item>
        <text:list-item>
          <text:p text:style-name="P37">producto,</text:p>
        </text:list-item>
        <text:list-item>
          <text:p text:style-name="P37">arquitectura,</text:p>
        </text:list-item>
        <text:list-item>
          <text:p text:style-name="P37">visión general del proyect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7:42:39.839891500</meta:creation-date>
    <dc:date>2026-05-20T17:43:07.267550700</dc:date>
    <meta:editing-duration>PT28S</meta:editing-duration>
    <meta:editing-cycles>1</meta:editing-cycles>
    <meta:document-statistic meta:table-count="0" meta:image-count="0" meta:object-count="0" meta:page-count="13" meta:paragraph-count="295" meta:word-count="1057" meta:character-count="6776" meta:non-whitespace-character-count="6132"/>
    <meta:generator>LibreOffice/26.2.3.2$Windows_X86_64 LibreOffice_project/70e089b17412e4cb7773e41413306b17a2328c34</meta:generator>
  </office:meta>
</office:document-meta>
</file>