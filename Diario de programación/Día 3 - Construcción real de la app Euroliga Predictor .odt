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Heading_20_1">
      <style:text-properties fo:font-size="18pt" style:font-size-asian="18pt" style:font-size-complex="18pt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Heading_20_1">
      <style:text-properties fo:font-size="12pt" style:font-size-asian="12pt" style:font-size-complex="12pt"/>
    </style:style>
    <style:style style:name="P16" style:family="paragraph" style:parent-style-name="Preformatted_20_Text">
      <style:paragraph-properties fo:margin-left="0cm" fo:margin-right="0cm" fo:text-indent="0cm" style:auto-text-indent="false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>
      <style:text-properties fo:font-size="12pt" style:font-size-asian="12pt" style:font-size-complex="12pt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Heading_20_1">
      <style:text-properties fo:font-size="11pt" style:font-size-asian="11pt" style:font-size-complex="11pt"/>
    </style:style>
    <style:style style:name="P30" style:family="paragraph" style:parent-style-name="Text_20_body">
      <style:text-properties fo:font-size="11pt" style:font-size-asian="11pt" style:font-size-complex="11pt"/>
    </style:style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5"/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6"/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 style:list-style-name="L17"/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P44" style:family="paragraph" style:parent-style-name="Text_20_body" style:list-style-name="L18"/>
    <style:style style:name="P45" style:family="paragraph" style:parent-style-name="Text_20_body" style:list-style-name="L19">
      <style:paragraph-properties fo:margin-top="0cm" fo:margin-bottom="0cm" style:contextual-spacing="false"/>
      <style:text-properties fo:font-size="11pt" style:font-size-asian="11pt" style:font-size-complex="11pt"/>
    </style:style>
    <style:style style:name="P46" style:family="paragraph" style:parent-style-name="Text_20_body" style:list-style-name="L19">
      <style:text-properties fo:font-size="11pt" style:font-size-asian="11pt" style:font-size-complex="11pt"/>
    </style:style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0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1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2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 style:list-style-name="L23"/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4"/>
    <style:style style:name="P57" style:family="paragraph" style:parent-style-name="Heading_20_2">
      <style:text-properties fo:font-size="11pt" style:font-size-asian="11pt" style:font-size-complex="11pt"/>
    </style:style>
    <style:style style:name="P58" style:family="paragraph" style:parent-style-name="Heading_20_1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P59" style:family="paragraph" style:parent-style-name="Text_20_body" style:list-style-name="L25">
      <style:paragraph-properties fo:margin-top="0cm" fo:margin-bottom="0cm" style:contextual-spacing="false"/>
      <style:text-properties fo:font-size="11pt" style:font-size-asian="11pt" style:font-size-complex="11pt"/>
    </style:style>
    <style:style style:name="P60" style:family="paragraph" style:parent-style-name="Text_20_body" style:list-style-name="L25">
      <style:text-properties fo:font-size="11pt" style:font-size-asian="11pt" style:font-size-complex="11pt"/>
    </style:style>
    <style:style style:name="P61" style:family="paragraph" style:parent-style-name="Text_20_body" style:list-style-name="L26">
      <style:paragraph-properties fo:margin-top="0cm" fo:margin-bottom="0cm" style:contextual-spacing="false"/>
      <style:text-properties fo:font-size="11pt" style:font-size-asian="11pt" style:font-size-complex="11pt"/>
    </style:style>
    <style:style style:name="P62" style:family="paragraph" style:parent-style-name="Text_20_body" style:list-style-name="L26">
      <style:text-properties fo:font-size="11pt" style:font-size-asian="11pt" style:font-size-complex="11pt"/>
    </style:style>
    <style:style style:name="P63" style:family="paragraph" style:parent-style-name="Horizontal_20_Line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P6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font-size="11pt" style:font-size-asian="11pt" style:font-size-complex="11pt"/>
    </style:style>
    <style:style style:name="P65" style:family="paragraph" style:parent-style-name="Text_20_body" style:list-style-name="L27">
      <style:paragraph-properties fo:margin-top="0cm" fo:margin-bottom="0cm" style:contextual-spacing="false"/>
      <style:text-properties fo:font-size="11pt" style:font-size-asian="11pt" style:font-size-complex="11pt"/>
    </style:style>
    <style:style style:name="P66" style:family="paragraph" style:parent-style-name="Text_20_body" style:list-style-name="L27">
      <style:text-properties fo:font-size="11pt" style:font-size-asian="11pt" style:font-size-complex="11pt"/>
    </style:style>
    <style:style style:name="P67" style:family="paragraph" style:parent-style-name="Text_20_body" style:list-style-name="L28">
      <style:paragraph-properties fo:margin-top="0cm" fo:margin-bottom="0cm" style:contextual-spacing="false"/>
      <style:text-properties fo:font-size="11pt" style:font-size-asian="11pt" style:font-size-complex="11pt"/>
    </style:style>
    <style:style style:name="P68" style:family="paragraph" style:parent-style-name="Text_20_body" style:list-style-name="L28">
      <style:text-properties fo:font-size="11pt" style:font-size-asian="11pt" style:font-size-complex="11pt"/>
    </style:style>
    <style:style style:name="P69" style:family="paragraph" style:parent-style-name="Text_20_body" style:list-style-name="L29">
      <style:paragraph-properties fo:margin-top="0cm" fo:margin-bottom="0cm" style:contextual-spacing="false"/>
      <style:text-properties fo:font-size="11pt" style:font-size-asian="11pt" style:font-size-complex="11pt"/>
    </style:style>
    <style:style style:name="P70" style:family="paragraph" style:parent-style-name="Text_20_body" style:list-style-name="L29">
      <style:text-properties fo:font-size="11pt" style:font-size-asian="11pt" style:font-size-complex="11pt"/>
    </style:style>
    <style:style style:name="P71" style:family="paragraph" style:parent-style-name="Text_20_body" style:list-style-name="L30">
      <style:paragraph-properties fo:margin-top="0cm" fo:margin-bottom="0cm" style:contextual-spacing="false"/>
      <style:text-properties fo:font-size="11pt" style:font-size-asian="11pt" style:font-size-complex="11pt"/>
    </style:style>
    <style:style style:name="P72" style:family="paragraph" style:parent-style-name="Text_20_body" style:list-style-name="L30">
      <style:text-properties fo:font-size="11pt" style:font-size-asian="11pt" style:font-size-complex="11pt"/>
    </style:style>
    <style:style style:name="P73" style:family="paragraph" style:parent-style-name="Text_20_body" style:list-style-name="L31">
      <style:paragraph-properties fo:margin-top="0cm" fo:margin-bottom="0cm" style:contextual-spacing="false"/>
      <style:text-properties fo:font-size="11pt" style:font-size-asian="11pt" style:font-size-complex="11pt"/>
    </style:style>
    <style:style style:name="P74" style:family="paragraph" style:parent-style-name="Text_20_body" style:list-style-name="L31">
      <style:text-properties fo:font-size="11pt" style:font-size-asian="11pt" style:font-size-complex="11pt"/>
    </style:style>
    <style:style style:name="P75" style:family="paragraph" style:parent-style-name="Text_20_body" style:list-style-name="L32">
      <style:paragraph-properties fo:margin-top="0cm" fo:margin-bottom="0cm" style:contextual-spacing="false"/>
      <style:text-properties fo:font-size="11pt" style:font-size-asian="11pt" style:font-size-complex="11pt"/>
    </style:style>
    <style:style style:name="P76" style:family="paragraph" style:parent-style-name="Text_20_body" style:list-style-name="L32">
      <style:text-properties fo:font-size="11pt" style:font-size-asian="11pt" style:font-size-complex="11pt"/>
    </style:style>
    <style:style style:name="P77" style:family="paragraph" style:parent-style-name="Text_20_body" style:list-style-name="L33">
      <style:paragraph-properties fo:margin-top="0cm" fo:margin-bottom="0cm" style:contextual-spacing="false"/>
      <style:text-properties fo:font-size="11pt" style:font-size-asian="11pt" style:font-size-complex="11pt"/>
    </style:style>
    <style:style style:name="P78" style:family="paragraph" style:parent-style-name="Text_20_body" style:list-style-name="L33">
      <style:text-properties fo:font-size="11pt" style:font-size-asian="11pt" style:font-size-complex="11pt"/>
    </style:style>
    <style:style style:name="P79" style:family="paragraph" style:parent-style-name="Text_20_body" style:list-style-name="L34">
      <style:text-properties fo:font-size="11pt" style:font-size-asian="11pt" style:font-size-complex="11pt"/>
    </style:style>
    <style:style style:name="P80" style:family="paragraph" style:parent-style-name="Preformatted_20_Text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P81" style:family="paragraph" style:parent-style-name="Text_20_body" style:list-style-name="L35">
      <style:paragraph-properties fo:margin-top="0cm" fo:margin-bottom="0cm" style:contextual-spacing="false"/>
      <style:text-properties fo:font-size="11pt" style:font-size-asian="11pt" style:font-size-complex="11pt"/>
    </style:style>
    <style:style style:name="P82" style:family="paragraph" style:parent-style-name="Text_20_body" style:list-style-name="L35">
      <style:text-properties fo:font-size="11pt" style:font-size-asian="11pt" style:font-size-complex="11pt"/>
    </style:style>
    <style:style style:name="P83" style:family="paragraph" style:parent-style-name="Heading_20_2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P84" style:family="paragraph" style:parent-style-name="Text_20_body" style:list-style-name="L36">
      <style:paragraph-properties fo:margin-top="0cm" fo:margin-bottom="0cm" style:contextual-spacing="false"/>
      <style:text-properties fo:font-size="11pt" style:font-size-asian="11pt" style:font-size-complex="11pt"/>
    </style:style>
    <style:style style:name="P85" style:family="paragraph" style:parent-style-name="Text_20_body" style:list-style-name="L36">
      <style:text-properties fo:font-size="11pt" style:font-size-asian="11pt" style:font-size-complex="11pt"/>
    </style:style>
    <style:style style:name="P86" style:family="paragraph" style:parent-style-name="Heading_20_3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P87" style:family="paragraph" style:parent-style-name="Text_20_body" style:list-style-name="L37">
      <style:paragraph-properties fo:margin-top="0cm" fo:margin-bottom="0cm" style:contextual-spacing="false"/>
      <style:text-properties fo:font-size="11pt" style:font-size-asian="11pt" style:font-size-complex="11pt"/>
    </style:style>
    <style:style style:name="P88" style:family="paragraph" style:parent-style-name="Text_20_body" style:list-style-name="L37">
      <style:text-properties fo:font-size="11pt" style:font-size-asian="11pt" style:font-size-complex="11pt"/>
    </style:style>
    <style:style style:name="P89" style:family="paragraph" style:parent-style-name="Text_20_body" style:list-style-name="L38">
      <style:paragraph-properties fo:margin-top="0cm" fo:margin-bottom="0cm" style:contextual-spacing="false"/>
      <style:text-properties fo:font-size="11pt" style:font-size-asian="11pt" style:font-size-complex="11pt"/>
    </style:style>
    <style:style style:name="P90" style:family="paragraph" style:parent-style-name="Text_20_body" style:list-style-name="L38">
      <style:text-properties fo:font-size="11pt" style:font-size-asian="11pt" style:font-size-complex="11pt"/>
    </style:style>
    <style:style style:name="P91" style:family="paragraph" style:parent-style-name="Text_20_body" style:list-style-name="L39">
      <style:paragraph-properties fo:margin-top="0cm" fo:margin-bottom="0cm" style:contextual-spacing="false"/>
      <style:text-properties fo:font-size="11pt" style:font-size-asian="11pt" style:font-size-complex="11pt"/>
    </style:style>
    <style:style style:name="P92" style:family="paragraph" style:parent-style-name="Text_20_body" style:list-style-name="L39">
      <style:text-properties fo:font-size="11pt" style:font-size-asian="11pt" style:font-size-complex="11pt"/>
    </style:style>
    <style:style style:name="P93" style:family="paragraph" style:parent-style-name="Text_20_body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P94" style:family="paragraph" style:parent-style-name="Text_20_body" style:list-style-name="L40">
      <style:paragraph-properties fo:margin-top="0cm" fo:margin-bottom="0cm" style:contextual-spacing="false"/>
      <style:text-properties fo:font-size="11pt" style:font-size-asian="11pt" style:font-size-complex="11pt"/>
    </style:style>
    <style:style style:name="P95" style:family="paragraph" style:parent-style-name="Text_20_body" style:list-style-name="L40">
      <style:text-properties fo:font-size="11pt" style:font-size-asian="11pt" style:font-size-complex="11pt"/>
    </style:style>
    <style:style style:name="P96" style:family="paragraph" style:parent-style-name="Text_20_body" style:list-style-name="L41">
      <style:paragraph-properties fo:margin-top="0cm" fo:margin-bottom="0cm" style:contextual-spacing="false"/>
      <style:text-properties fo:font-size="11pt" style:font-size-asian="11pt" style:font-size-complex="11pt"/>
    </style:style>
    <style:style style:name="P97" style:family="paragraph" style:parent-style-name="Text_20_body" style:list-style-name="L41">
      <style:text-properties fo:font-size="11pt" style:font-size-asian="11pt" style:font-size-complex="11pt"/>
    </style:style>
    <style:style style:name="P98" style:family="paragraph" style:parent-style-name="Text_20_body" style:list-style-name="L42">
      <style:paragraph-properties fo:margin-top="0cm" fo:margin-bottom="0cm" style:contextual-spacing="false"/>
      <style:text-properties fo:font-size="11pt" style:font-size-asian="11pt" style:font-size-complex="11pt"/>
    </style:style>
    <style:style style:name="P99" style:family="paragraph" style:parent-style-name="Text_20_body" style:list-style-name="L42">
      <style:text-properties fo:font-size="11pt" style:font-size-asian="11pt" style:font-size-complex="11pt"/>
    </style:style>
    <style:style style:name="P100" style:family="paragraph" style:parent-style-name="Text_20_body" style:list-style-name="L43">
      <style:paragraph-properties fo:margin-top="0cm" fo:margin-bottom="0cm" style:contextual-spacing="false"/>
      <style:text-properties fo:font-size="11pt" style:font-size-asian="11pt" style:font-size-complex="11pt"/>
    </style:style>
    <style:style style:name="P101" style:family="paragraph" style:parent-style-name="Text_20_body" style:list-style-name="L43">
      <style:text-properties fo:font-size="11pt" style:font-size-asian="11pt" style:font-size-complex="11pt"/>
    </style:style>
    <style:style style:name="P102" style:family="paragraph" style:parent-style-name="Text_20_body" style:list-style-name="L44">
      <style:paragraph-properties fo:margin-top="0cm" fo:margin-bottom="0cm" style:contextual-spacing="false"/>
      <style:text-properties fo:font-size="11pt" style:font-size-asian="11pt" style:font-size-complex="11pt"/>
    </style:style>
    <style:style style:name="P103" style:family="paragraph" style:parent-style-name="Text_20_body" style:list-style-name="L44">
      <style:text-properties fo:font-size="11pt" style:font-size-asian="11pt" style:font-size-complex="11pt"/>
    </style:style>
    <style:style style:name="P104" style:family="paragraph" style:parent-style-name="Text_20_body" style:list-style-name="L45">
      <style:paragraph-properties fo:margin-top="0cm" fo:margin-bottom="0cm" style:contextual-spacing="false"/>
      <style:text-properties fo:font-size="11pt" style:font-size-asian="11pt" style:font-size-complex="11pt"/>
    </style:style>
    <style:style style:name="P105" style:family="paragraph" style:parent-style-name="Text_20_body" style:list-style-name="L45">
      <style:text-properties fo:font-size="11pt" style:font-size-asian="11pt" style:font-size-complex="11pt"/>
    </style:style>
    <style:style style:name="P106" style:family="paragraph" style:parent-style-name="Text_20_body" style:list-style-name="L46">
      <style:paragraph-properties fo:margin-top="0cm" fo:margin-bottom="0cm" style:contextual-spacing="false"/>
      <style:text-properties fo:font-size="11pt" style:font-size-asian="11pt" style:font-size-complex="11pt"/>
    </style:style>
    <style:style style:name="P107" style:family="paragraph" style:parent-style-name="Text_20_body" style:list-style-name="L46">
      <style:text-properties fo:font-size="11pt" style:font-size-asian="11pt" style:font-size-complex="11pt"/>
    </style:style>
    <style:style style:name="P108" style:family="paragraph" style:parent-style-name="Text_20_body" style:list-style-name="L47">
      <style:paragraph-properties fo:margin-top="0cm" fo:margin-bottom="0cm" style:contextual-spacing="false"/>
      <style:text-properties fo:font-size="11pt" style:font-size-asian="11pt" style:font-size-complex="11pt"/>
    </style:style>
    <style:style style:name="P109" style:family="paragraph" style:parent-style-name="Text_20_body" style:list-style-name="L47">
      <style:text-properties fo:font-size="11pt" style:font-size-asian="11pt" style:font-size-complex="11pt"/>
    </style:style>
    <style:style style:name="P110" style:family="paragraph" style:parent-style-name="Text_20_body" style:list-style-name="L48">
      <style:paragraph-properties fo:margin-top="0cm" fo:margin-bottom="0cm" style:contextual-spacing="false"/>
      <style:text-properties fo:font-size="11pt" style:font-size-asian="11pt" style:font-size-complex="11pt"/>
    </style:style>
    <style:style style:name="P111" style:family="paragraph" style:parent-style-name="Text_20_body" style:list-style-name="L48">
      <style:text-properties fo:font-size="11pt" style:font-size-asian="11pt" style:font-size-complex="11pt"/>
    </style:style>
    <style:style style:name="P112" style:family="paragraph" style:parent-style-name="Text_20_body" style:list-style-name="L49">
      <style:paragraph-properties fo:margin-top="0cm" fo:margin-bottom="0cm" style:contextual-spacing="false"/>
      <style:text-properties fo:font-size="11pt" style:font-size-asian="11pt" style:font-size-complex="11pt"/>
    </style:style>
    <style:style style:name="P113" style:family="paragraph" style:parent-style-name="Text_20_body" style:list-style-name="L49">
      <style:text-properties fo:font-size="11pt" style:font-size-asian="11pt" style:font-size-complex="11pt"/>
    </style:style>
    <style:style style:name="P114" style:family="paragraph" style:parent-style-name="Text_20_body" style:list-style-name="L50">
      <style:paragraph-properties fo:margin-top="0cm" fo:margin-bottom="0cm" style:contextual-spacing="false"/>
      <style:text-properties fo:font-size="11pt" style:font-size-asian="11pt" style:font-size-complex="11pt"/>
    </style:style>
    <style:style style:name="P115" style:family="paragraph" style:parent-style-name="Text_20_body" style:list-style-name="L50">
      <style:text-properties fo:font-size="11pt" style:font-size-asian="11pt" style:font-size-complex="11pt"/>
    </style:style>
    <style:style style:name="P116" style:family="paragraph" style:parent-style-name="Text_20_body" style:list-style-name="L51">
      <style:paragraph-properties fo:margin-top="0cm" fo:margin-bottom="0cm" style:contextual-spacing="false"/>
      <style:text-properties fo:font-size="11pt" style:font-size-asian="11pt" style:font-size-complex="11pt"/>
    </style:style>
    <style:style style:name="P117" style:family="paragraph" style:parent-style-name="Text_20_body" style:list-style-name="L51">
      <style:text-properties fo:font-size="11pt" style:font-size-asian="11pt" style:font-size-complex="11pt"/>
    </style:style>
    <style:style style:name="P118" style:family="paragraph" style:parent-style-name="Text_20_body" style:list-style-name="L52">
      <style:paragraph-properties fo:margin-top="0cm" fo:margin-bottom="0cm" style:contextual-spacing="false"/>
      <style:text-properties fo:font-size="11pt" style:font-size-asian="11pt" style:font-size-complex="11pt"/>
    </style:style>
    <style:style style:name="P119" style:family="paragraph" style:parent-style-name="Text_20_body" style:list-style-name="L52">
      <style:text-properties fo:font-size="11pt" style:font-size-asian="11pt" style:font-size-complex="11pt"/>
    </style:style>
    <style:style style:name="P120" style:family="paragraph" style:parent-style-name="Text_20_body" style:list-style-name="L53">
      <style:paragraph-properties fo:margin-top="0cm" fo:margin-bottom="0cm" style:contextual-spacing="false"/>
      <style:text-properties fo:font-size="11pt" style:font-size-asian="11pt" style:font-size-complex="11pt"/>
    </style:style>
    <style:style style:name="P121" style:family="paragraph" style:parent-style-name="Text_20_body" style:list-style-name="L53">
      <style:text-properties fo:font-size="11pt" style:font-size-asian="11pt" style:font-size-complex="11pt"/>
    </style:style>
    <style:style style:name="P122" style:family="paragraph" style:parent-style-name="Text_20_body" style:list-style-name="L54">
      <style:paragraph-properties fo:margin-top="0cm" fo:margin-bottom="0cm" style:contextual-spacing="false"/>
      <style:text-properties fo:font-size="11pt" style:font-size-asian="11pt" style:font-size-complex="11pt"/>
    </style:style>
    <style:style style:name="P123" style:family="paragraph" style:parent-style-name="Text_20_body" style:list-style-name="L54">
      <style:text-properties fo:font-size="11pt" style:font-size-asian="11pt" style:font-size-complex="11pt"/>
    </style:style>
    <style:style style:name="P124" style:family="paragraph" style:parent-style-name="Text_20_body" style:list-style-name="L55">
      <style:paragraph-properties fo:margin-top="0cm" fo:margin-bottom="0cm" style:contextual-spacing="false"/>
      <style:text-properties fo:font-size="11pt" style:font-size-asian="11pt" style:font-size-complex="11pt"/>
    </style:style>
    <style:style style:name="P125" style:family="paragraph" style:parent-style-name="Text_20_body" style:list-style-name="L55">
      <style:text-properties fo:font-size="11pt" style:font-size-asian="11pt" style:font-size-complex="11pt"/>
    </style:style>
    <style:style style:name="P126" style:family="paragraph" style:parent-style-name="Text_20_body" style:list-style-name="L56">
      <style:paragraph-properties fo:margin-top="0cm" fo:margin-bottom="0cm" style:contextual-spacing="false"/>
      <style:text-properties fo:font-size="11pt" style:font-size-asian="11pt" style:font-size-complex="11pt"/>
    </style:style>
    <style:style style:name="P127" style:family="paragraph" style:parent-style-name="Text_20_body" style:list-style-name="L56">
      <style:text-properties fo:font-size="11pt" style:font-size-asian="11pt" style:font-size-complex="11pt"/>
    </style:style>
    <style:style style:name="P128" style:family="paragraph" style:parent-style-name="Text_20_body" style:list-style-name="L57">
      <style:paragraph-properties fo:margin-top="0cm" fo:margin-bottom="0cm" style:contextual-spacing="false"/>
      <style:text-properties fo:font-size="11pt" style:font-size-asian="11pt" style:font-size-complex="11pt"/>
    </style:style>
    <style:style style:name="P129" style:family="paragraph" style:parent-style-name="Text_20_body" style:list-style-name="L57">
      <style:text-properties fo:font-size="11pt" style:font-size-asian="11pt" style:font-size-complex="11pt"/>
    </style:style>
    <style:style style:name="P130" style:family="paragraph" style:parent-style-name="Text_20_body" style:list-style-name="L58">
      <style:paragraph-properties fo:margin-top="0cm" fo:margin-bottom="0cm" style:contextual-spacing="false"/>
      <style:text-properties fo:font-size="11pt" style:font-size-asian="11pt" style:font-size-complex="11pt"/>
    </style:style>
    <style:style style:name="P131" style:family="paragraph" style:parent-style-name="Text_20_body" style:list-style-name="L58">
      <style:text-properties fo:font-size="11pt" style:font-size-asian="11pt" style:font-size-complex="11pt"/>
    </style:style>
    <style:style style:name="P132" style:family="paragraph" style:parent-style-name="Text_20_body" style:list-style-name="L59">
      <style:paragraph-properties fo:margin-top="0cm" fo:margin-bottom="0cm" style:contextual-spacing="false"/>
      <style:text-properties fo:font-size="11pt" style:font-size-asian="11pt" style:font-size-complex="11pt"/>
    </style:style>
    <style:style style:name="P133" style:family="paragraph" style:parent-style-name="Text_20_body" style:list-style-name="L59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Diario de Desarrollo — Día 3</text:h>
      <text:h text:style-name="Heading_20_1" text:outline-level="1">Euroliga Predictor App 🏀📱</text:h>
      <text:h text:style-name="Heading_20_2" text:outline-level="2">Primer día de desarrollo “real” de producto</text:h>
      <text:p text:style-name="Text_20_body">El día de hoy marcó un cambio muy importante en el proyecto.<text:line-break/>Hasta ahora se había trabajado principalmente en:</text:p>
      <text:list text:style-name="L1">
        <text:list-item>
          <text:p text:style-name="P1">instalación del entorno, </text:p>
        </text:list-item>
        <text:list-item>
          <text:p text:style-name="P1">estructura base, </text:p>
        </text:list-item>
        <text:list-item>
          <text:p text:style-name="P1">organización inicial, </text:p>
        </text:list-item>
        <text:list-item>
          <text:p text:style-name="P2">primeras pantallas. </text:p>
        </text:list-item>
      </text:list>
      <text:p text:style-name="Text_20_body">Sin embargo, hoy la aplicación comenzó realmente a comportarse como una app funcional de análisis deportivo.</text:p>
      <text:p text:style-name="Text_20_body">La sesión se centró en cuatro grandes objetivos:</text:p>
      <text:list text:style-name="L2">
        <text:list-item>
          <text:p text:style-name="P3">Convertir los datos en dinámicos. </text:p>
        </text:list-item>
        <text:list-item>
          <text:p text:style-name="P3">Crear navegación real entre pantallas. </text:p>
        </text:list-item>
        <text:list-item>
          <text:p text:style-name="P3">Construir la primera versión de la pantalla MatchUp. </text:p>
        </text:list-item>
        <text:list-item>
          <text:p text:style-name="P4">Empezar a definir la filosofía UX y de producto de la aplicación. </text:p>
        </text:list-item>
      </text:list>
      <text:p text:style-name="Horizontal_20_Line"/>
      <text:h text:style-name="Heading_20_1" text:outline-level="1">🏗️ Revisión y consolidación de estructura Flutter</text:h>
      <text:p text:style-name="Text_20_body">Nada más comenzar se revisó la estructura actual del proyecto Flutter.</text:p>
      <text:p text:style-name="Text_20_body">Se comprobó que dentro de:</text:p>
      <text:section text:style-name="Sect1" text:name="code-block-viewer">
        <text:p text:style-name="P5"><text:span text:style-name="Source_20_Text">lib/</text:span></text:p>
      </text:section>
      <text:p text:style-name="Text_20_body">ya existían:</text:p>
      <text:list text:style-name="L3">
        <text:list-item>
          <text:p text:style-name="P6"><text:span text:style-name="Source_20_Text">screens</text:span> </text:p>
        </text:list-item>
        <text:list-item>
          <text:p text:style-name="P6"><text:span text:style-name="Source_20_Text">models</text:span> </text:p>
        </text:list-item>
        <text:list-item>
          <text:p text:style-name="P7"><text:span text:style-name="Source_20_Text">data</text:span> </text:p>
        </text:list-item>
      </text:list>
      <text:p text:style-name="Text_20_body">aunque faltaban todavía carpetas futuras como:</text:p>
      <text:list text:style-name="L4">
        <text:list-item>
          <text:p text:style-name="P8"><text:span text:style-name="Source_20_Text">components</text:span> </text:p>
        </text:list-item>
        <text:list-item>
          <text:p text:style-name="P8"><text:span text:style-name="Source_20_Text">navigation</text:span> </text:p>
        </text:list-item>
        <text:list-item>
          <text:p text:style-name="P8"><text:span text:style-name="Source_20_Text">utils</text:span> </text:p>
        </text:list-item>
        <text:list-item>
          <text:p text:style-name="P8"><text:span text:style-name="Source_20_Text">hooks</text:span> </text:p>
        </text:list-item>
        <text:list-item>
          <text:p text:style-name="P9"><text:span text:style-name="Source_20_Text">constants</text:span> </text:p>
        </text:list-item>
      </text:list>
      <text:p text:style-name="Text_20_body"><text:soft-page-break/>Se decidió conscientemente:</text:p>
      <text:h text:style-name="P10" text:outline-level="1">NO sobrearquitecturar todavía.</text:h>
      <text:p text:style-name="Text_20_body">La prioridad pasó a ser:</text:p>
      <text:section text:style-name="Sect1" text:name="Sección1">
        <text:p text:style-name="P5"><text:bookmark text:name="code-block-viewer"/><text:span text:style-name="Source_20_Text">hacer funcionar el flujo completo primero</text:span></text:p>
      </text:section>
      <text:p text:style-name="Text_20_body">antes de crear capas innecesarias.</text:p>
      <text:p text:style-name="Text_20_body">Esto fue una decisión importante de producto y arquitectura.</text:p>
      <text:p text:style-name="Horizontal_20_Line"/>
      <text:h text:style-name="Heading_20_1" text:outline-level="1">📦 Creación y consolidación de modelos</text:h>
      <text:h text:style-name="Heading_20_2" text:outline-level="2"><text:span text:style-name="Source_20_Text">team.dart</text:span></text:h>
      <text:p text:style-name="Text_20_body">Durante el desarrollo ya existía el modelo:</text:p>
      <text:section text:style-name="Sect1" text:name="Sección2">
        <text:p text:style-name="P5"><text:bookmark text:name="code-block-viewer Copia 1"/><text:span text:style-name="Source_20_Text">lib/models/team.dart</text:span></text:p>
      </text:section>
      <text:p text:style-name="Text_20_body">que representa:</text:p>
      <text:list text:style-name="L5">
        <text:list-item>
          <text:p text:style-name="P11">nombre del equipo, </text:p>
        </text:list-item>
        <text:list-item>
          <text:p text:style-name="P12">logo. </text:p>
        </text:list-item>
      </text:list>
      <text:p text:style-name="Text_20_body">Este modelo empezó a convertirse en la base central de la app.</text:p>
      <text:p text:style-name="Horizontal_20_Line"/>
      <text:h text:style-name="Heading_20_1" text:outline-level="1">📦 Creación de <text:span text:style-name="Source_20_Text">standing.dart</text:span></text:h>
      <text:p text:style-name="Text_20_body">Se consolidó:</text:p>
      <text:section text:style-name="Sect1" text:name="Sección3">
        <text:p text:style-name="P5"><text:bookmark text:name="code-block-viewer Copia 2"/><text:span text:style-name="Source_20_Text">lib/models/standing.dart</text:span></text:p>
      </text:section>
      <text:p text:style-name="Text_20_body">con propiedades:</text:p>
      <text:list text:style-name="L6">
        <text:list-item>
          <text:p text:style-name="P13">wins </text:p>
        </text:list-item>
        <text:list-item>
          <text:p text:style-name="P13">losses </text:p>
        </text:list-item>
        <text:list-item>
          <text:p text:style-name="P13">pointsFor </text:p>
        </text:list-item>
        <text:list-item>
          <text:p text:style-name="P13">pointsAgainst </text:p>
        </text:list-item>
        <text:list-item>
          <text:p text:style-name="P14">team </text:p>
        </text:list-item>
      </text:list>
      <text:p text:style-name="Text_20_body">Este paso fue importante porque:</text:p>
      <text:h text:style-name="P15" text:outline-level="1">separó completamente la lógica estadística del UI.</text:h>
      <text:p text:style-name="Horizontal_20_Line"/>
      <text:h text:style-name="Heading_20_1" text:outline-level="1"><text:soft-page-break/>📦 Creación de <text:span text:style-name="Source_20_Text">game.dart</text:span></text:h>
      <text:p text:style-name="Text_20_body">Uno de los grandes hitos del día fue crear:</text:p>
      <text:section text:style-name="Sect1" text:name="Sección4">
        <text:p text:style-name="P5"><text:bookmark text:name="code-block-viewer Copia 3"/><text:span text:style-name="Source_20_Text">lib/models/game.dart</text:span></text:p>
      </text:section>
      <text:p text:style-name="Text_20_body">con estructura aproximada:</text:p>
      <text:section text:style-name="Sect1" text:name="Sección5">
        <text:p text:style-name="P16"><text:bookmark text:name="code-block-viewer Copia 4"/><text:span text:style-name="Source_20_Text">class Game {</text:span></text:p>
        <text:p text:style-name="Preformatted_20_Text"><text:span text:style-name="Source_20_Text"><text:s text:c="2"/>final Team homeTeam;</text:span></text:p>
        <text:p text:style-name="Preformatted_20_Text"><text:span text:style-name="Source_20_Text"><text:s text:c="2"/>final Team awayTeam;</text:span></text:p>
        <text:p text:style-name="Preformatted_20_Text"><text:span text:style-name="Source_20_Text"><text:s text:c="2"/>final int homeScore;</text:span></text:p>
        <text:p text:style-name="Preformatted_20_Text"><text:span text:style-name="Source_20_Text"><text:s text:c="2"/>final int awayScore;</text:span></text:p>
        <text:p text:style-name="Preformatted_20_Text"><text:span text:style-name="Source_20_Text"><text:s text:c="2"/>final String status;</text:span></text:p>
        <text:p text:style-name="P17"><text:span text:style-name="Source_20_Text">}</text:span></text:p>
      </text:section>
      <text:p text:style-name="Text_20_body">Esto permitió representar partidos reales dentro de la aplicación.</text:p>
      <text:p text:style-name="Horizontal_20_Line"/>
      <text:h text:style-name="Heading_20_1" text:outline-level="1">🧠 Primer gran cambio de mentalidad</text:h>
      <text:p text:style-name="Text_20_body">Hasta este momento la app estaba hecha principalmente de:</text:p>
      <text:section text:style-name="Sect1" text:name="Sección6">
        <text:p text:style-name="P5"><text:bookmark text:name="code-block-viewer Copia 5"/><text:span text:style-name="Source_20_Text">widgets escritos manualmente</text:span></text:p>
      </text:section>
      <text:p text:style-name="Text_20_body">Con <text:span text:style-name="Source_20_Text">Game</text:span>, <text:span text:style-name="Source_20_Text">Standing</text:span> y <text:span text:style-name="Source_20_Text">Team</text:span><text:line-break/>el proyecto comenzó a orientarse hacia:</text:p>
      <text:h text:style-name="Heading_20_1" text:outline-level="1">arquitectura basada en datos.</text:h>
      <text:p text:style-name="Text_20_body">Eso fue un paso muy importante.</text:p>
      <text:p text:style-name="Horizontal_20_Line"/>
      <text:h text:style-name="Heading_20_1" text:outline-level="1">📂 Creación de <text:span text:style-name="Source_20_Text">mock_games.dart</text:span></text:h>
      <text:p text:style-name="Text_20_body">Posteriormente se creó:</text:p>
      <text:section text:style-name="Sect1" text:name="Sección7">
        <text:p text:style-name="P5"><text:bookmark text:name="code-block-viewer Copia 6"/><text:span text:style-name="Source_20_Text">lib/data/mock_games.dart</text:span></text:p>
      </text:section>
      <text:p text:style-name="Text_20_body">con partidos mock como:</text:p>
      <text:list text:style-name="L7">
        <text:list-item>
          <text:p text:style-name="P18">Real Madrid vs Fenerbahce </text:p>
        </text:list-item>
        <text:list-item>
          <text:p text:style-name="P18">Olympiacos vs Barcelona </text:p>
        </text:list-item>
        <text:list-item>
          <text:p text:style-name="P19">Monaco vs Partizan </text:p>
        </text:list-item>
      </text:list>
      <text:p text:style-name="Text_20_body">Incluyendo:</text:p>
      <text:list text:style-name="L8">
        <text:list-item>
          <text:p text:style-name="P20">marcadores, </text:p>
        </text:list-item>
        <text:list-item>
          <text:p text:style-name="P20">logos, </text:p>
        </text:list-item>
        <text:list-item>
          <text:p text:style-name="P20">estados LIVE, </text:p>
        </text:list-item>
        <text:list-item>
          <text:p text:style-name="P21">horarios. </text:p>
        </text:list-item>
      </text:list>
      <text:p text:style-name="Horizontal_20_Line"><text:soft-page-break/></text:p>
      <text:h text:style-name="Heading_20_1" text:outline-level="1">🔥 Conversión de GamesScreen en dinámica</text:h>
      <text:p text:style-name="Text_20_body">Inicialmente <text:span text:style-name="Source_20_Text">GamesScreen</text:span> contenía múltiples bloques:</text:p>
      <text:section text:style-name="Sect1" text:name="Sección8">
        <text:p text:style-name="P16"><text:bookmark text:name="code-block-viewer Copia 7"/><text:span text:style-name="Source_20_Text">GameCard(</text:span></text:p>
        <text:p text:style-name="Preformatted_20_Text"><text:span text:style-name="Source_20_Text"><text:s text:c="2"/>homeTeam: Team(...),</text:span></text:p>
        <text:p text:style-name="P17"><text:span text:style-name="Source_20_Text">)</text:span></text:p>
      </text:section>
      <text:p text:style-name="Text_20_body">escritos manualmente.</text:p>
      <text:p text:style-name="Text_20_body">Esto generaba:</text:p>
      <text:list text:style-name="L9">
        <text:list-item>
          <text:p text:style-name="P22">código repetido, </text:p>
        </text:list-item>
        <text:list-item>
          <text:p text:style-name="P22">poca escalabilidad, </text:p>
        </text:list-item>
        <text:list-item>
          <text:p text:style-name="P23">mantenimiento complicado. </text:p>
        </text:list-item>
      </text:list>
      <text:p text:style-name="Horizontal_20_Line"/>
      <text:h text:style-name="Heading_20_2" text:outline-level="2">Refactor importante</text:h>
      <text:p text:style-name="Text_20_body">Se sustituyó toda la estructura manual por:</text:p>
      <text:section text:style-name="Sect1" text:name="Sección9">
        <text:p text:style-name="P5"><text:bookmark text:name="code-block-viewer Copia 8"/><text:span text:style-name="Source_20_Text">...mockGames.map((game) {</text:span></text:p>
      </text:section>
      <text:p text:style-name="Text_20_body">convirtiendo:</text:p>
      <text:h text:style-name="Heading_20_1" text:outline-level="1">la pantalla en dinámica.</text:h>
      <text:p text:style-name="Horizontal_20_Line"/>
      <text:h text:style-name="Heading_20_1" text:outline-level="1">🧠 Aprendizaje importante</text:h>
      <text:p text:style-name="Text_20_body">Aquí se entendió uno de los conceptos clave de Flutter:</text:p>
      <text:section text:style-name="Sect1" text:name="Sección10">
        <text:p text:style-name="P16"><text:bookmark text:name="code-block-viewer Copia 9"/><text:span text:style-name="Source_20_Text">La UI debe renderizar datos.</text:span></text:p>
        <text:p text:style-name="P17"><text:span text:style-name="Source_20_Text">No contener los datos.</text:span></text:p>
      </text:section>
      <text:p text:style-name="Text_20_body">Ese cambio de mentalidad fue probablemente uno de los más importantes del día.</text:p>
      <text:p text:style-name="Horizontal_20_Line"/>
      <text:h text:style-name="Heading_20_1" text:outline-level="1">🏀 Creación de MatchUpScreen</text:h>
      <text:p text:style-name="Text_20_body">Después se creó:</text:p>
      <text:section text:style-name="Sect1" text:name="Sección11">
        <text:p text:style-name="P5"><text:bookmark text:name="code-block-viewer Copia 10"/><text:span text:style-name="Source_20_Text">lib/screens/matchup_screen.dart</text:span></text:p>
      </text:section>
      <text:p text:style-name="Text_20_body">Esta se convirtió inmediatamente en:</text:p>
      <text:h text:style-name="Heading_20_1" text:outline-level="1"><text:soft-page-break/>la pantalla principal del producto.</text:h>
      <text:p text:style-name="Horizontal_20_Line"/>
      <text:h text:style-name="Heading_20_1" text:outline-level="1">🎯 Primera versión de MatchUp</text:h>
      <text:p text:style-name="Text_20_body">La pantalla incluía:</text:p>
      <text:list text:style-name="L10">
        <text:list-item>
          <text:p text:style-name="P24">logos grandes, </text:p>
        </text:list-item>
        <text:list-item>
          <text:p text:style-name="P24">marcador, </text:p>
        </text:list-item>
        <text:list-item>
          <text:p text:style-name="P24">nombres equipos, </text:p>
        </text:list-item>
        <text:list-item>
          <text:p text:style-name="P24">estado LIVE, </text:p>
        </text:list-item>
        <text:list-item>
          <text:p text:style-name="P24">probabilidad de victoria mock, </text:p>
        </text:list-item>
        <text:list-item>
          <text:p text:style-name="P25">comentario IA mock. </text:p>
        </text:list-item>
      </text:list>
      <text:p text:style-name="P26">Visualmente fue el momento en que:</text:p>
      <text:h text:style-name="P15" text:outline-level="1">la app empezó realmente a parecer una aplicación deportiva.</text:h>
      <text:p text:style-name="Horizontal_20_Line"/>
      <text:h text:style-name="Heading_20_1" text:outline-level="1">⚠️ Primer gran bloqueo técnico</text:h>
      <text:p text:style-name="Text_20_body">Al intentar navegar desde:</text:p>
      <text:section text:style-name="Sect1" text:name="Sección12">
        <text:p text:style-name="P5"><text:bookmark text:name="code-block-viewer Copia 11"/><text:span text:style-name="Source_20_Text">GamesScreen → MatchUpScreen</text:span></text:p>
      </text:section>
      <text:p text:style-name="Text_20_body">aparecieron muchísimos errores relacionados con:</text:p>
      <text:list text:style-name="L11">
        <text:list-item>
          <text:p text:style-name="P27"><text:span text:style-name="Source_20_Text">GestureDetector</text:span> </text:p>
        </text:list-item>
        <text:list-item>
          <text:p text:style-name="P27"><text:span text:style-name="Source_20_Text">Navigator.push</text:span> </text:p>
        </text:list-item>
        <text:list-item>
          <text:p text:style-name="P27">paréntesis </text:p>
        </text:list-item>
        <text:list-item>
          <text:p text:style-name="P28">widgets anidados. </text:p>
        </text:list-item>
      </text:list>
      <text:p text:style-name="Horizontal_20_Line"/>
      <text:h text:style-name="Heading_20_1" text:outline-level="1">🔥 Problemas encontrados</text:h>
      <text:h text:style-name="Heading_20_2" text:outline-level="2">❌ Errores de llaves y cierres</text:h>
      <text:p text:style-name="Text_20_body">Flutter mostraba constantemente:</text:p>
      <text:section text:style-name="Sect1" text:name="Sección13">
        <text:p text:style-name="P5"><text:bookmark text:name="code-block-viewer Copia 12"/><text:span text:style-name="Source_20_Text">Can't find '}'</text:span></text:p>
      </text:section>
      <text:p text:style-name="Text_20_body">y:</text:p>
      <text:section text:style-name="Sect1" text:name="Sección14">
        <text:p text:style-name="P5"><text:bookmark text:name="code-block-viewer Copia 13"/><text:span text:style-name="Source_20_Text">Can't find ')'</text:span></text:p>
      </text:section>
      <text:p text:style-name="Horizontal_20_Line"/>
      <text:h text:style-name="Heading_20_1" text:outline-level="1"><text:soft-page-break/>🧠 Aprendizaje importante</text:h>
      <text:p text:style-name="Text_20_body">Se comprendió que:</text:p>
      <text:h text:style-name="P29" text:outline-level="1">en Flutter la estructura visual depende totalmente de los cierres correctos.</text:h>
      <text:p text:style-name="P30">Y que:</text:p>
      <text:list text:style-name="L12">
        <text:list-item>
          <text:p text:style-name="P31">un único <text:span text:style-name="Source_20_Text">)</text:span> mal colocado </text:p>
        </text:list-item>
        <text:list-item>
          <text:p text:style-name="P32">puede romper widgets enteros. </text:p>
        </text:list-item>
      </text:list>
      <text:p text:style-name="Horizontal_20_Line"/>
      <text:h text:style-name="Heading_20_1" text:outline-level="1">✅ Solución</text:h>
      <text:p text:style-name="Text_20_body">Finalmente se reorganizó:</text:p>
      <text:list text:style-name="L13">
        <text:list-item>
          <text:p text:style-name="P33"><text:span text:style-name="Source_20_Text">GameCard</text:span> </text:p>
        </text:list-item>
        <text:list-item>
          <text:p text:style-name="P33"><text:span text:style-name="Source_20_Text">GestureDetector</text:span> </text:p>
        </text:list-item>
        <text:list-item>
          <text:p text:style-name="P34"><text:span text:style-name="Source_20_Text">Navigator.push</text:span> </text:p>
        </text:list-item>
      </text:list>
      <text:p text:style-name="P30">hasta conseguir:</text:p>
      <text:h text:style-name="P29" text:outline-level="1">navegación funcional completa.</text:h>
      <text:p text:style-name="Horizontal_20_Line"/>
      <text:h text:style-name="Heading_20_1" text:outline-level="1">🎉 Primer momento “wow”</text:h>
      <text:p text:style-name="Text_20_body">Al pulsar un partido y abrir:</text:p>
      <text:section text:style-name="Sect1" text:name="Sección15">
        <text:p text:style-name="P5"><text:bookmark text:name="code-block-viewer Copia 14"/><text:span text:style-name="Source_20_Text">MatchUpScreen</text:span></text:p>
      </text:section>
      <text:p text:style-name="P30">se produjo el primer momento donde:</text:p>
      <text:h text:style-name="P29" text:outline-level="1">la aplicación empezó a sentirse real.</text:h>
      <text:p text:style-name="Horizontal_20_Line"/>
      <text:h text:style-name="Heading_20_1" text:outline-level="1">🖼️ Problemas con logos</text:h>
      <text:p text:style-name="Text_20_body">Posteriormente aparecieron errores de assets:</text:p>
      <text:section text:style-name="Sect1" text:name="Sección16">
        <text:p text:style-name="P5"><text:bookmark text:name="code-block-viewer Copia 15"/><text:span text:style-name="Source_20_Text">Unable to load asset</text:span></text:p>
      </text:section>
      <text:p text:style-name="Text_20_body">El problema estaba en:</text:p>
      <text:section text:style-name="Sect1" text:name="Sección17">
        <text:p text:style-name="P5"><text:bookmark text:name="code-block-viewer Copia 16"/><text:span text:style-name="Source_20_Text">assets/logos/assets/logos/</text:span></text:p>
      </text:section>
      <text:p text:style-name="Text_20_body">duplicado.</text:p>
      <text:p text:style-name="Horizontal_20_Line"/>
      <text:h text:style-name="Heading_20_1" text:outline-level="1"><text:soft-page-break/>🧠 Solución importante</text:h>
      <text:p text:style-name="Text_20_body">Se entendió que:</text:p>
      <text:h text:style-name="P29" text:outline-level="1">Team ya contenía la ruta completa del logo.</text:h>
      <text:p text:style-name="Text_20_body">Por tanto:</text:p>
      <text:section text:style-name="Sect1" text:name="Sección18">
        <text:p text:style-name="P5"><text:bookmark text:name="code-block-viewer Copia 17"/><text:span text:style-name="Source_20_Text">Image.asset(game.homeTeam.logo)</text:span></text:p>
      </text:section>
      <text:p text:style-name="Text_20_body">era suficiente.</text:p>
      <text:p text:style-name="Horizontal_20_Line"/>
      <text:h text:style-name="Heading_20_1" text:outline-level="1">⚠️ Problemas con contenido dinámico</text:h>
      <text:p text:style-name="Text_20_body">Más adelante:</text:p>
      <text:list text:style-name="L14">
        <text:list-item>
          <text:p text:style-name="P35">logos cambiaban, </text:p>
        </text:list-item>
        <text:list-item>
          <text:p text:style-name="P36">pero nombres seguían fijos. </text:p>
        </text:list-item>
      </text:list>
      <text:p text:style-name="Text_20_body">El origen fue:</text:p>
      <text:section text:style-name="Sect1" text:name="Sección19">
        <text:p text:style-name="P5"><text:bookmark text:name="code-block-viewer Copia 18"/><text:span text:style-name="Source_20_Text">const Column(</text:span></text:p>
      </text:section>
      <text:p text:style-name="Horizontal_20_Line"/>
      <text:h text:style-name="Heading_20_1" text:outline-level="1">🧠 Gran aprendizaje Flutter</text:h>
      <text:p text:style-name="Text_20_body">Se descubrió que:</text:p>
      <text:h text:style-name="Heading_20_1" text:outline-level="1"><text:span text:style-name="T1">widgets </text:span><text:span text:style-name="Source_20_Text"><text:span text:style-name="T1">const</text:span></text:span><text:span text:style-name="T1"> no pueden contener valores dinámicos.</text:span></text:h>
      <text:p text:style-name="P30">Eliminar:</text:p>
      <text:section text:style-name="Sect1" text:name="Sección20">
        <text:p text:style-name="P5"><text:bookmark text:name="code-block-viewer Copia 19"/><text:span text:style-name="Source_20_Text">const</text:span></text:p>
      </text:section>
      <text:p text:style-name="Text_20_body">solucionó completamente el problema.</text:p>
      <text:p text:style-name="Horizontal_20_Line"/>
      <text:h text:style-name="Heading_20_1" text:outline-level="1">📊 Integración de estadísticas reales</text:h>
      <text:p text:style-name="Text_20_body">Posteriormente se conectó:</text:p>
      <text:list text:style-name="L15">
        <text:list-item>
          <text:p text:style-name="P37"><text:span text:style-name="Source_20_Text">Game</text:span> </text:p>
        </text:list-item>
        <text:list-item>
          <text:p text:style-name="P38">con <text:span text:style-name="Source_20_Text">mockStandings</text:span>. </text:p>
        </text:list-item>
      </text:list>
      <text:p text:style-name="Text_20_body">Usando:</text:p>
      <text:section text:style-name="Sect1" text:name="Sección21">
        <text:p text:style-name="P5"><text:bookmark text:name="code-block-viewer Copia 20"/><text:span text:style-name="Source_20_Text">mockStandings.firstWhere(...)</text:span></text:p>
      </text:section>
      <text:p text:style-name="Text_20_body">para buscar:</text:p>
      <text:list text:style-name="L16">
        <text:list-item>
          <text:p text:style-name="P39"><text:soft-page-break/>victorias, </text:p>
        </text:list-item>
        <text:list-item>
          <text:p text:style-name="P39">derrotas, </text:p>
        </text:list-item>
        <text:list-item>
          <text:p text:style-name="P40">puntos. </text:p>
        </text:list-item>
      </text:list>
      <text:p text:style-name="Horizontal_20_Line"/>
      <text:h text:style-name="Heading_20_1" text:outline-level="1">😵 Gran bloqueo del día</text:h>
      <text:p text:style-name="Text_20_body">Aquí comenzó la parte más frustrante.</text:p>
      <text:p text:style-name="Text_20_body">Las estadísticas:</text:p>
      <text:list text:style-name="L17">
        <text:list-item>
          <text:p text:style-name="P41">existían, </text:p>
        </text:list-item>
        <text:list-item>
          <text:p text:style-name="P41">compilaban, </text:p>
        </text:list-item>
        <text:list-item>
          <text:p text:style-name="P42">pero NO aparecían visualmente. </text:p>
        </text:list-item>
      </text:list>
      <text:p text:style-name="Horizontal_20_Line"/>
      <text:h text:style-name="Heading_20_1" text:outline-level="1">🔍 Debugging realizado</text:h>
      <text:p text:style-name="Text_20_body">Se probaron MUCHAS hipótesis:</text:p>
      <text:list text:style-name="L18">
        <text:list-item>
          <text:p text:style-name="P43">problemas de scroll, </text:p>
        </text:list-item>
        <text:list-item>
          <text:p text:style-name="P43">height fija, </text:p>
        </text:list-item>
        <text:list-item>
          <text:p text:style-name="P43">widgets fuera del árbol, </text:p>
        </text:list-item>
        <text:list-item>
          <text:p text:style-name="P43">problemas de render, </text:p>
        </text:list-item>
        <text:list-item>
          <text:p text:style-name="P43">Flutter cache, </text:p>
        </text:list-item>
        <text:list-item>
          <text:p text:style-name="P43">layouts rotos, </text:p>
        </text:list-item>
        <text:list-item>
          <text:p text:style-name="P43">columnas cerradas incorrectamente, </text:p>
        </text:list-item>
        <text:list-item>
          <text:p text:style-name="P44">widgets fuera de <text:span text:style-name="Source_20_Text">children</text:span>. </text:p>
        </text:list-item>
      </text:list>
      <text:p text:style-name="Horizontal_20_Line"/>
      <text:h text:style-name="Heading_20_1" text:outline-level="1">🧠 Lección importante</text:h>
      <text:p text:style-name="P30">Se entendió algo muy valioso:</text:p>
      <text:h text:style-name="P29" text:outline-level="1">muchas veces el problema NO está donde parece.</text:h>
      <text:p text:style-name="Horizontal_20_Line"/>
      <text:h text:style-name="Heading_20_1" text:outline-level="1">🚨 Estado “corrupto”</text:h>
      <text:p text:style-name="Text_20_body">Tras muchas modificaciones parciales:</text:p>
      <text:section text:style-name="Sect1" text:name="Sección22">
        <text:p text:style-name="P5"><text:bookmark text:name="code-block-viewer Copia 21"/><text:span text:style-name="Source_20_Text">matchup_screen.dart</text:span></text:p>
      </text:section>
      <text:p text:style-name="Text_20_body">acabó estructuralmente inconsistente.</text:p>
      <text:p text:style-name="Horizontal_20_Line"/>
      <text:h text:style-name="Heading_20_1" text:outline-level="1"><text:soft-page-break/>✅ Solución definitiva</text:h>
      <text:p text:style-name="P30">Finalmente:</text:p>
      <text:h text:style-name="P29" text:outline-level="1">se reescribió COMPLETAMENTE el archivo.</text:h>
      <text:p text:style-name="P30">Esto permitió:</text:p>
      <text:list text:style-name="L19">
        <text:list-item>
          <text:p text:style-name="P45">limpiar widgets, </text:p>
        </text:list-item>
        <text:list-item>
          <text:p text:style-name="P45">restaurar jerarquía correcta, </text:p>
        </text:list-item>
        <text:list-item>
          <text:p text:style-name="P46">recuperar renderizado. </text:p>
        </text:list-item>
      </text:list>
      <text:p text:style-name="Horizontal_20_Line"/>
      <text:h text:style-name="Heading_20_1" text:outline-level="1">🎉 Resultado final</text:h>
      <text:p text:style-name="Text_20_body">Finalmente aparecieron correctamente:</text:p>
      <text:list text:style-name="L20">
        <text:list-item>
          <text:p text:style-name="P47">Wins </text:p>
        </text:list-item>
        <text:list-item>
          <text:p text:style-name="P47">Losses </text:p>
        </text:list-item>
        <text:list-item>
          <text:p text:style-name="P47">Points For </text:p>
        </text:list-item>
        <text:list-item>
          <text:p text:style-name="P48">Points Against </text:p>
        </text:list-item>
      </text:list>
      <text:p text:style-name="Text_20_body">debajo de:</text:p>
      <text:section text:style-name="Sect1" text:name="Sección23">
        <text:p text:style-name="P5"><text:bookmark text:name="code-block-viewer Copia 22"/><text:span text:style-name="Source_20_Text">Win Probability</text:span></text:p>
      </text:section>
      <text:p text:style-name="Horizontal_20_Line"/>
      <text:h text:style-name="Heading_20_1" text:outline-level="1">🧠 Reflexión UX importante</text:h>
      <text:p text:style-name="Text_20_body">Una vez funcionando,<text:line-break/>apareció una reflexión MUY relevante:</text:p>
      <text:h text:style-name="Heading_20_2" text:outline-level="2">El formato:</text:h>
      <text:section text:style-name="Sect1" text:name="Sección24">
        <text:p text:style-name="P5"><text:bookmark text:name="code-block-viewer Copia 23"/><text:span text:style-name="Source_20_Text">24 - 21</text:span></text:p>
      </text:section>
      <text:p text:style-name="Text_20_body">NO era visualmente claro.</text:p>
      <text:p text:style-name="Horizontal_20_Line"/>
      <text:h text:style-name="Heading_20_1" text:outline-level="1">💡 Gran debate UX del día</text:h>
      <text:p text:style-name="Text_20_body">Se discutieron dos modelos:</text:p>
      <text:p text:style-name="Horizontal_20_Line"/>
      <text:h text:style-name="Heading_20_2" text:outline-level="2">Opción 1 — Scroll vertical</text:h>
      <text:p text:style-name="Text_20_body">Muchas estadísticas visibles:</text:p>
      <text:list text:style-name="L21">
        <text:list-item>
          <text:p text:style-name="P49"><text:soft-page-break/>Wins </text:p>
        </text:list-item>
        <text:list-item>
          <text:p text:style-name="P49">Losses </text:p>
        </text:list-item>
        <text:list-item>
          <text:p text:style-name="P49">Offensive Rating </text:p>
        </text:list-item>
        <text:list-item>
          <text:p text:style-name="P50">etc. </text:p>
        </text:list-item>
      </text:list>
      <text:p text:style-name="Horizontal_20_Line"/>
      <text:h text:style-name="Heading_20_2" text:outline-level="2">Opción 2 — Swipe horizontal</text:h>
      <text:p text:style-name="Text_20_body">Una sola estadística por pantalla:</text:p>
      <text:section text:style-name="Sect1" text:name="Sección25">
        <text:p text:style-name="P16"><text:bookmark text:name="code-block-viewer Copia 24"/><text:span text:style-name="Source_20_Text">WINS</text:span></text:p>
        <text:p text:style-name="P17"><text:span text:style-name="Source_20_Text">← →</text:span></text:p>
      </text:section>
      <text:p text:style-name="Horizontal_20_Line"/>
      <text:h text:style-name="Heading_20_1" text:outline-level="1">🎯 Decisión tomada</text:h>
      <text:p text:style-name="P30">Finalmente se decidió:</text:p>
      <text:h text:style-name="P29" text:outline-level="1">modelo híbrido.</text:h>
      <text:p text:style-name="Horizontal_20_Line"/>
      <text:h text:style-name="Heading_20_1" text:outline-level="1">🚀 MVP inicial</text:h>
      <text:h text:style-name="Heading_20_2" text:outline-level="2">Parte fija superior</text:h>
      <text:list text:style-name="L22">
        <text:list-item>
          <text:p text:style-name="P51">logos, </text:p>
        </text:list-item>
        <text:list-item>
          <text:p text:style-name="P51">marcador, </text:p>
        </text:list-item>
        <text:list-item>
          <text:p text:style-name="P52">probabilidad. </text:p>
        </text:list-item>
      </text:list>
      <text:h text:style-name="Heading_20_2" text:outline-level="2">Parte scrollable inferior</text:h>
      <text:list text:style-name="L23">
        <text:list-item>
          <text:p text:style-name="P53">cards estadísticas, </text:p>
        </text:list-item>
        <text:list-item>
          <text:p text:style-name="P53">verde/rojo, </text:p>
        </text:list-item>
        <text:list-item>
          <text:p text:style-name="P54">comparación clara. </text:p>
        </text:list-item>
      </text:list>
      <text:p text:style-name="Horizontal_20_Line"/>
      <text:h text:style-name="Heading_20_1" text:outline-level="1">🚀 Futuro premium</text:h>
      <text:p text:style-name="Text_20_body">Más adelante:</text:p>
      <text:list text:style-name="L24">
        <text:list-item>
          <text:p text:style-name="P55">swipe horizontal, </text:p>
        </text:list-item>
        <text:list-item>
          <text:p text:style-name="P55">animaciones, </text:p>
        </text:list-item>
        <text:list-item>
          <text:p text:style-name="P55">barras comparativas, </text:p>
        </text:list-item>
        <text:list-item>
          <text:p text:style-name="P55">IA contextual, </text:p>
        </text:list-item>
        <text:list-item>
          <text:p text:style-name="P56">analytics avanzados. </text:p>
        </text:list-item>
      </text:list>
      <text:p text:style-name="Horizontal_20_Line"><text:soft-page-break/></text:p>
      <text:h text:style-name="P57" text:outline-level="2">Expansión completa de la Euroliga y consolidación de assets 🏀🔥</text:h>
      <text:p text:style-name="P30">Antes de finalizar la sesión se decidió realizar una mejora estructural muy importante para el proyecto:</text:p>
      <text:h text:style-name="P58" text:outline-level="1">completar completamente la base mock de equipos y clasificación Euroliga.</text:h>
      <text:p text:style-name="P30">Hasta ese momento la aplicación trabajaba con un conjunto reducido de equipos:</text:p>
      <text:list text:style-name="L25">
        <text:list-item>
          <text:p text:style-name="P59">Real Madrid </text:p>
        </text:list-item>
        <text:list-item>
          <text:p text:style-name="P59">Olympiacos </text:p>
        </text:list-item>
        <text:list-item>
          <text:p text:style-name="P59">Fenerbahce </text:p>
        </text:list-item>
        <text:list-item>
          <text:p text:style-name="P60">algunos equipos adicionales </text:p>
        </text:list-item>
      </text:list>
      <text:p text:style-name="P30">lo que limitaba:</text:p>
      <text:list text:style-name="L26">
        <text:list-item>
          <text:p text:style-name="P61">pruebas visuales, </text:p>
        </text:list-item>
        <text:list-item>
          <text:p text:style-name="P61">generación de matchups, </text:p>
        </text:list-item>
        <text:list-item>
          <text:p text:style-name="P61">escalabilidad, </text:p>
        </text:list-item>
        <text:list-item>
          <text:p text:style-name="P62">sensación de producto real. </text:p>
        </text:list-item>
      </text:list>
      <text:p text:style-name="P63"/>
      <text:h text:style-name="P58" text:outline-level="1">🚀 Expansión de <text:span text:style-name="Source_20_Text">mock_standings.dart</text:span></text:h>
      <text:p text:style-name="P30">Se amplió completamente:</text:p>
      <text:section text:style-name="Sect1" text:name="Sección30">
        <text:p text:style-name="P64"><text:bookmark text:name="code-block-viewer Copia 29"/><text:span text:style-name="Source_20_Text">lib/data/mock_standings.dart</text:span></text:p>
      </text:section>
      <text:p text:style-name="P30">añadiendo:</text:p>
      <text:list text:style-name="L27">
        <text:list-item>
          <text:p text:style-name="P65">los 20 equipos de la temporada seleccionada, </text:p>
        </text:list-item>
        <text:list-item>
          <text:p text:style-name="P65">estadísticas completas mock, </text:p>
        </text:list-item>
        <text:list-item>
          <text:p text:style-name="P65">logos individuales, </text:p>
        </text:list-item>
        <text:list-item>
          <text:p text:style-name="P66">standings coherentes. </text:p>
        </text:list-item>
      </text:list>
      <text:p text:style-name="P63"/>
      <text:h text:style-name="P58" text:outline-level="1">🧠 Decisión importante de producto</text:h>
      <text:p text:style-name="P30">Durante el proceso se debatió cómo manejar:</text:p>
      <text:list text:style-name="L28">
        <text:list-item>
          <text:p text:style-name="P67">nombres largos, </text:p>
        </text:list-item>
        <text:list-item>
          <text:p text:style-name="P67">nombres oficiales, </text:p>
        </text:list-item>
        <text:list-item>
          <text:p text:style-name="P68">nombres cortos. </text:p>
        </text:list-item>
      </text:list>
      <text:p text:style-name="P30">Finalmente se decidió:</text:p>
      <text:h text:style-name="P58" text:outline-level="1">utilizar nombres simplificados y consistentes.</text:h>
      <text:p text:style-name="P30">Por ejemplo:</text:p>
      <text:list text:style-name="L29">
        <text:list-item>
          <text:p text:style-name="P69">“Monaco” en lugar de “AS Monaco” </text:p>
        </text:list-item>
        <text:list-item>
          <text:p text:style-name="P69">“Milano” en lugar de “Olimpia Milano” </text:p>
        </text:list-item>
        <text:list-item>
          <text:p text:style-name="P70">“Paris” en lugar de “Paris Basketball” </text:p>
        </text:list-item>
      </text:list>
      <text:p text:style-name="P30">Esto se hizo por varias razones:</text:p>
      <text:list text:style-name="L30">
        <text:list-item>
          <text:p text:style-name="P71">mejor UX móvil, </text:p>
        </text:list-item>
        <text:list-item>
          <text:p text:style-name="P71">layouts más limpios, </text:p>
        </text:list-item>
        <text:list-item>
          <text:p text:style-name="P71"><text:soft-page-break/>menos problemas de overflow, </text:p>
        </text:list-item>
        <text:list-item>
          <text:p text:style-name="P71">consistencia entre modelos, </text:p>
        </text:list-item>
        <text:list-item>
          <text:p text:style-name="P72">facilidad para búsquedas y comparaciones. </text:p>
        </text:list-item>
      </text:list>
      <text:p text:style-name="P63"/>
      <text:h text:style-name="P58" text:outline-level="1">📦 Equipos incorporados</text:h>
      <text:p text:style-name="P30">La app pasó a incluir:</text:p>
      <text:list text:style-name="L31">
        <text:list-item>
          <text:p text:style-name="P73">Olympiacos </text:p>
        </text:list-item>
        <text:list-item>
          <text:p text:style-name="P73">Valencia </text:p>
        </text:list-item>
        <text:list-item>
          <text:p text:style-name="P73">Real Madrid </text:p>
        </text:list-item>
        <text:list-item>
          <text:p text:style-name="P73">Fenerbahce </text:p>
        </text:list-item>
        <text:list-item>
          <text:p text:style-name="P73">Zalgiris </text:p>
        </text:list-item>
        <text:list-item>
          <text:p text:style-name="P73">Hapoel </text:p>
        </text:list-item>
        <text:list-item>
          <text:p text:style-name="P73">Panathinaikos </text:p>
        </text:list-item>
        <text:list-item>
          <text:p text:style-name="P73">Monaco </text:p>
        </text:list-item>
        <text:list-item>
          <text:p text:style-name="P73">Barcelona </text:p>
        </text:list-item>
        <text:list-item>
          <text:p text:style-name="P73">Crvena Zvezda </text:p>
        </text:list-item>
        <text:list-item>
          <text:p text:style-name="P73">Dubai </text:p>
        </text:list-item>
        <text:list-item>
          <text:p text:style-name="P73">Maccabi </text:p>
        </text:list-item>
        <text:list-item>
          <text:p text:style-name="P73">Bayern </text:p>
        </text:list-item>
        <text:list-item>
          <text:p text:style-name="P73">Milano </text:p>
        </text:list-item>
        <text:list-item>
          <text:p text:style-name="P73">Partizan </text:p>
        </text:list-item>
        <text:list-item>
          <text:p text:style-name="P73">Paris </text:p>
        </text:list-item>
        <text:list-item>
          <text:p text:style-name="P73">Virtus </text:p>
        </text:list-item>
        <text:list-item>
          <text:p text:style-name="P73">Baskonia </text:p>
        </text:list-item>
        <text:list-item>
          <text:p text:style-name="P73">Anadolu Efes </text:p>
        </text:list-item>
        <text:list-item>
          <text:p text:style-name="P74">ASVEL </text:p>
        </text:list-item>
      </text:list>
      <text:p text:style-name="P63"/>
      <text:h text:style-name="P58" text:outline-level="1">⚠️ Problemas encontrados con assets</text:h>
      <text:p text:style-name="P30">Durante la integración aparecieron múltiples errores relacionados con imágenes y assets.</text:p>
      <text:p text:style-name="P30">Flutter mostraba errores como:</text:p>
      <text:section text:style-name="Sect1" text:name="Sección31">
        <text:p text:style-name="P64"><text:bookmark text:name="code-block-viewer Copia 30"/><text:span text:style-name="Source_20_Text">Unable to load asset</text:span></text:p>
      </text:section>
      <text:p text:style-name="P30">y posteriormente:</text:p>
      <text:section text:style-name="Sect1" text:name="Sección32">
        <text:p text:style-name="P64"><text:bookmark text:name="code-block-viewer Copia 31"/><text:span text:style-name="Source_20_Text">PathNotFoundException</text:span></text:p>
      </text:section>
      <text:p text:style-name="P63"/>
      <text:h text:style-name="P58" text:outline-level="1">🔍 Descubrimiento importante</text:h>
      <text:p text:style-name="P30">Se detectó que:</text:p>
      <text:h text:style-name="P58" text:outline-level="1">un único logo inexistente podía romper renderizados completos del ListView.</text:h>
      <text:p text:style-name="P30">Esto provocaba:</text:p>
      <text:list text:style-name="L32">
        <text:list-item>
          <text:p text:style-name="P75">equipos desaparecidos, </text:p>
        </text:list-item>
        <text:list-item>
          <text:p text:style-name="P75">standings incompletos, </text:p>
        </text:list-item>
        <text:list-item>
          <text:p text:style-name="P75">render parcial, </text:p>
        </text:list-item>
        <text:list-item>
          <text:p text:style-name="P76">comportamientos aparentemente aleatorios. </text:p>
        </text:list-item>
      </text:list>
      <text:p text:style-name="P63"><text:soft-page-break/></text:p>
      <text:h text:style-name="P58" text:outline-level="1">🧠 Aprendizaje importante Flutter</text:h>
      <text:p text:style-name="P30">Se comprendió algo muy relevante para desarrollo móvil:</text:p>
      <text:h text:style-name="P58" text:outline-level="1">Flutter depende muchísimo de la integridad de los assets.</text:h>
      <text:p text:style-name="P30">Y que:</text:p>
      <text:list text:style-name="L33">
        <text:list-item>
          <text:p text:style-name="P77">una sola imagen mal nombrada, </text:p>
        </text:list-item>
        <text:list-item>
          <text:p text:style-name="P78">o una ruta incorrecta,<text:line-break/>puede afectar visualmente toda una pantalla. </text:p>
        </text:list-item>
      </text:list>
      <text:p text:style-name="P63"/>
      <text:h text:style-name="P58" text:outline-level="1">⚠️ Caso específico: Alba Berlin</text:h>
      <text:p text:style-name="P30">Se descubrió que:</text:p>
      <text:list text:style-name="L34">
        <text:list-item>
          <text:p text:style-name="P79"><text:span text:style-name="Source_20_Text">alba.png</text:span><text:line-break/>seguía siendo referenciado internamente,<text:line-break/>aunque el equipo ya había sido eliminado de la temporada mock actual. </text:p>
        </text:list-item>
      </text:list>
      <text:p text:style-name="P30">Esto generó:</text:p>
      <text:section text:style-name="Sect1" text:name="Sección33">
        <text:p text:style-name="P64"><text:bookmark text:name="code-block-viewer Copia 32"/><text:span text:style-name="Source_20_Text">Cannot open file:</text:span></text:p>
        <text:p text:style-name="P80"><text:span text:style-name="Source_20_Text">assets/logos/alba.png</text:span></text:p>
      </text:section>
      <text:p text:style-name="P63"/>
      <text:h text:style-name="P58" text:outline-level="1">🔥 Solución</text:h>
      <text:p text:style-name="P30">Se decidió:</text:p>
      <text:list text:style-name="L35">
        <text:list-item>
          <text:p text:style-name="P81">eliminar completamente Alba Berlin, </text:p>
        </text:list-item>
        <text:list-item>
          <text:p text:style-name="P81">sustituirlo por Hapoel, </text:p>
        </text:list-item>
        <text:list-item>
          <text:p text:style-name="P81">limpiar referencias antiguas, </text:p>
        </text:list-item>
        <text:list-item>
          <text:p text:style-name="P82">unificar assets. </text:p>
        </text:list-item>
      </text:list>
      <text:p text:style-name="P63"/>
      <text:h text:style-name="P58" text:outline-level="1">🧠 Problema adicional: caché de Flutter</text:h>
      <text:p text:style-name="P30">Incluso después de eliminar:</text:p>
      <text:section text:style-name="Sect1" text:name="Sección34">
        <text:p text:style-name="P64"><text:bookmark text:name="code-block-viewer Copia 33"/><text:span text:style-name="Source_20_Text">alba.png</text:span></text:p>
      </text:section>
      <text:p text:style-name="P30">Flutter seguía intentando cargarlo.</text:p>
      <text:p text:style-name="P30">Esto llevó a otro aprendizaje muy importante:</text:p>
      <text:h text:style-name="P58" text:outline-level="1">Flutter cachea assets agresivamente.</text:h>
      <text:p text:style-name="P63"/>
      <text:h text:style-name="P58" text:outline-level="1">✅ Solución definitiva</text:h>
      <text:p text:style-name="P30">Se ejecutó:</text:p>
      <text:section text:style-name="Sect1" text:name="Sección35">
        <text:p text:style-name="P64"><text:bookmark text:name="code-block-viewer Copia 34"/><text:span text:style-name="Source_20_Text">flutter clean</text:span></text:p>
        <text:p text:style-name="P80"><text:span text:style-name="Source_20_Text">flutter pub get</text:span></text:p>
        <text:p text:style-name="P80"><text:soft-page-break/><text:span text:style-name="Source_20_Text">flutter run</text:span></text:p>
      </text:section>
      <text:p text:style-name="P30">y finalmente:</text:p>
      <text:h text:style-name="P58" text:outline-level="1">todos los equipos aparecieron correctamente.</text:h>
      <text:p text:style-name="P63"/>
      <text:h text:style-name="P58" text:outline-level="1">🎉 Resultado final</text:h>
      <text:p text:style-name="P30">La aplicación terminó el día con:</text:p>
      <text:h text:style-name="P83" text:outline-level="2">✅ 20 equipos completos</text:h>
      <text:h text:style-name="P83" text:outline-level="2">✅ Standings funcionales</text:h>
      <text:h text:style-name="P83" text:outline-level="2">✅ Logos consistentes</text:h>
      <text:h text:style-name="P83" text:outline-level="2">✅ MatchUps compatibles</text:h>
      <text:h text:style-name="P83" text:outline-level="2">✅ Datos coherentes</text:h>
      <text:h text:style-name="P83" text:outline-level="2">✅ Arquitectura estable</text:h>
      <text:p text:style-name="P63"/>
      <text:h text:style-name="P58" text:outline-level="1">🧠 Sensación final del proyecto</text:h>
      <text:p text:style-name="P30">Con la incorporación de todos los equipos:</text:p>
      <text:h text:style-name="P58" text:outline-level="1">la aplicación dejó definitivamente de sentirse como una demo.</text:h>
      <text:p text:style-name="P30">Ahora:</text:p>
      <text:list text:style-name="L36">
        <text:list-item>
          <text:p text:style-name="P84">standings parecen reales, </text:p>
        </text:list-item>
        <text:list-item>
          <text:p text:style-name="P84">matchups tienen variedad, </text:p>
        </text:list-item>
        <text:list-item>
          <text:p text:style-name="P84">navegación resulta natural, </text:p>
        </text:list-item>
        <text:list-item>
          <text:p text:style-name="P85">y la app empieza a transmitir sensación de ecosistema completo. </text:p>
        </text:list-item>
      </text:list>
      <text:p text:style-name="P63"/>
      <text:h text:style-name="P58" text:outline-level="1">🚀 Próximo objetivo (Día 4)</text:h>
      <text:p text:style-name="P30">La siguiente fase será:</text:p>
      <text:h text:style-name="P58" text:outline-level="1">transformar MatchUp en una experiencia visual premium.</text:h>
      <text:p text:style-name="P63"/>
      <text:h text:style-name="P83" text:outline-level="2">Próximas tareas previstas</text:h>
      <text:h text:style-name="P86" text:outline-level="3">📌 Crear <text:span text:style-name="Source_20_Text">StatCard</text:span></text:h>
      <text:section text:style-name="Sect1" text:name="Sección36">
        <text:p text:style-name="P64"><text:bookmark text:name="code-block-viewer Copia 35"/><text:span text:style-name="Source_20_Text">components/stat_card.dart</text:span></text:p>
      </text:section>
      <text:p text:style-name="P63"/>
      <text:h text:style-name="P86" text:outline-level="3">📌 Refactor visual de estadísticas</text:h>
      <text:p text:style-name="P30">Pasar de:</text:p>
      <text:section text:style-name="Sect1" text:name="Sección37">
        <text:p text:style-name="P64"><text:bookmark text:name="code-block-viewer Copia 36"/><text:span text:style-name="Source_20_Text">24 - 21</text:span></text:p>
      </text:section>
      <text:p text:style-name="P30">a:</text:p>
      <text:section text:style-name="Sect1" text:name="Sección38">
        <text:p text:style-name="P64"><text:bookmark text:name="code-block-viewer Copia 37"/><text:span text:style-name="Source_20_Text">🟢 24 <text:s text:c="5"/>21 🔴</text:span></text:p>
      </text:section>
      <text:p text:style-name="P63"><text:soft-page-break/></text:p>
      <text:h text:style-name="P86" text:outline-level="3">📌 Añadir colores dinámicos</text:h>
      <text:list text:style-name="L37">
        <text:list-item>
          <text:p text:style-name="P87">verde → mejor </text:p>
        </text:list-item>
        <text:list-item>
          <text:p text:style-name="P88">rojo → peor </text:p>
        </text:list-item>
      </text:list>
      <text:p text:style-name="P63"/>
      <text:h text:style-name="P86" text:outline-level="3">📌 Mejorar spacing y jerarquía visual</text:h>
      <text:p text:style-name="P63"/>
      <text:h text:style-name="P86" text:outline-level="3">📌 Implementar futuras barras comparativas</text:h>
      <text:p text:style-name="P63"/>
      <text:h text:style-name="P86" text:outline-level="3">📌 Consolidar UX híbrida:</text:h>
      <text:list text:style-name="L38">
        <text:list-item>
          <text:p text:style-name="P89">scroll vertical, </text:p>
        </text:list-item>
        <text:list-item>
          <text:p text:style-name="P89">stat cards independientes, </text:p>
        </text:list-item>
        <text:list-item>
          <text:p text:style-name="P89">logos fijos arriba, </text:p>
        </text:list-item>
        <text:list-item>
          <text:p text:style-name="P90">futura posibilidad de swipe horizontal premium. </text:p>
        </text:list-item>
      </text:list>
      <text:p text:style-name="P63"/>
      <text:h text:style-name="P58" text:outline-level="1">🎯 Cierre del día</text:h>
      <text:p text:style-name="P30">Hoy fue uno de los días más importantes del proyecto hasta ahora.</text:p>
      <text:p text:style-name="P30">No solo por:</text:p>
      <text:list text:style-name="L39">
        <text:list-item>
          <text:p text:style-name="P91">líneas de código, </text:p>
        </text:list-item>
        <text:list-item>
          <text:p text:style-name="P91">widgets, </text:p>
        </text:list-item>
        <text:list-item>
          <text:p text:style-name="P92">o pantallas. </text:p>
        </text:list-item>
      </text:list>
      <text:p text:style-name="P30">Sino porque:</text:p>
      <text:h text:style-name="P58" text:outline-level="1">empezó a consolidarse una visión real de producto deportivo moderno 🙂</text:h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83" text:outline-level="2"><text:soft-page-break/>Día 3 (Segunda Parte) — Branding, UX visual y consolidación de la app</text:h>
      <text:p text:style-name="P30">La segunda parte del Día 3 estuvo centrada en transformar el proyecto desde una aplicación funcional de pruebas hacia algo que ya empieza a sentirse como un producto deportivo real, con identidad propia, branding sólido y una experiencia visual mucho más profesional.</text:p>
      <text:p text:style-name="P63"/>
      <text:h text:style-name="P58" text:outline-level="1">🎨 1. Evolución visual de la pantalla Standings</text:h>
      <text:p text:style-name="P30">Durante esta sesión se siguió refinando la pantalla de clasificación (<text:span text:style-name="Source_20_Text">StandingsScreen</text:span>), que ya contenía los 20 equipos de Euroliga con sus estadísticas mock.</text:p>
      <text:h text:style-name="P83" text:outline-level="2">Mejoras realizadas:</text:h>
      <text:h text:style-name="P86" text:outline-level="3">✅ Numeración de posiciones</text:h>
      <text:p text:style-name="P30">Se añadió el ranking visual (<text:span text:style-name="Source_20_Text">1.</text:span>, <text:span text:style-name="Source_20_Text">2.</text:span>, <text:span text:style-name="Source_20_Text">3.</text:span>...) a cada equipo de la clasificación.</text:p>
      <text:p text:style-name="P30">Inicialmente el número aparecía junto al nombre del equipo:</text:p>
      <text:section text:style-name="Sect1" text:name="Sección26">
        <text:p text:style-name="P64"><text:bookmark text:name="code-block-viewer Copia 47"/><text:span text:style-name="Source_20_Text">'${index + 1}. ${standing.team.name}'</text:span></text:p>
      </text:section>
      <text:p text:style-name="P30">Más tarde se reorganizó el layout para separar:</text:p>
      <text:list text:style-name="L40">
        <text:list-item>
          <text:p text:style-name="P94">número, </text:p>
        </text:list-item>
        <text:list-item>
          <text:p text:style-name="P94">logo, </text:p>
        </text:list-item>
        <text:list-item>
          <text:p text:style-name="P95">nombre del equipo, </text:p>
        </text:list-item>
      </text:list>
      <text:p text:style-name="P30">consiguiendo una estructura mucho más parecida a aplicaciones deportivas reales.</text:p>
      <text:p text:style-name="P63"/>
      <text:h text:style-name="P83" text:outline-level="2">✅ Ajustes visuales del ranking</text:h>
      <text:p text:style-name="P30">Se experimentó con:</text:p>
      <text:list text:style-name="L41">
        <text:list-item>
          <text:p text:style-name="P96">tamaños de fuente, </text:p>
        </text:list-item>
        <text:list-item>
          <text:p text:style-name="P96">colores, </text:p>
        </text:list-item>
        <text:list-item>
          <text:p text:style-name="P97">pesos tipográficos. </text:p>
        </text:list-item>
      </text:list>
      <text:p text:style-name="P30">Finalmente el número quedó en:</text:p>
      <text:section text:style-name="Sect1" text:name="Sección27">
        <text:p text:style-name="P64"><text:bookmark text:name="code-block-viewer Copia 48"/><text:span text:style-name="Source_20_Text">fontSize: 18</text:span></text:p>
      </text:section>
      <text:p text:style-name="P30">porque ofrecía el mejor equilibrio visual:</text:p>
      <text:list text:style-name="L42">
        <text:list-item>
          <text:p text:style-name="P98">visible, </text:p>
        </text:list-item>
        <text:list-item>
          <text:p text:style-name="P98">elegante, </text:p>
        </text:list-item>
        <text:list-item>
          <text:p text:style-name="P99">sin robar protagonismo al logo. </text:p>
        </text:list-item>
      </text:list>
      <text:p text:style-name="P63"/>
      <text:h text:style-name="P58" text:outline-level="1">🟢🟡 2. Colores visuales de clasificación</text:h>
      <text:p text:style-name="P30">Se implementó uno de los cambios más importantes a nivel UX:</text:p>
      <text:h text:style-name="P83" text:outline-level="2">Clasificación visual automática:</text:h>
      <text:list text:style-name="L43">
        <text:list-item>
          <text:p text:style-name="P100">🟢 Verde tenue → puestos de Playoff directo (1-6) </text:p>
        </text:list-item>
        <text:list-item>
          <text:p text:style-name="P101">🟡 Amarillo/Naranja tenue → puestos de Play-In (7-10) </text:p>
        </text:list-item>
      </text:list>
      <text:p text:style-name="P30">Código implementado:</text:p>
      <text:section text:style-name="Sect1" text:name="Sección28">
        <text:p text:style-name="P64"><text:bookmark text:name="code-block-viewer Copia 49"/><text:soft-page-break/><text:span text:style-name="Source_20_Text">Color cardColor = const Color(0xFF1C1C1E);</text:span></text:p>
        <text:p text:style-name="P80"><text:span text:style-name="Source_20_Text">if (index &lt;= 5) {</text:span></text:p>
        <text:p text:style-name="P80"><text:span text:style-name="Source_20_Text"><text:s text:c="2"/>cardColor = Colors.green.withOpacity(0.15);</text:span></text:p>
        <text:p text:style-name="P80"><text:span text:style-name="Source_20_Text">} else if (index &lt;= 9) {</text:span></text:p>
        <text:p text:style-name="P80"><text:span text:style-name="Source_20_Text"><text:s text:c="2"/>cardColor = Colors.orange.withOpacity(0.15);</text:span></text:p>
        <text:p text:style-name="P80"><text:span text:style-name="Source_20_Text">}</text:span></text:p>
      </text:section>
      <text:p text:style-name="P30">y posteriormente aplicado al <text:span text:style-name="Source_20_Text">Card</text:span>:</text:p>
      <text:section text:style-name="Sect1" text:name="Sección29">
        <text:p text:style-name="P64"><text:bookmark text:name="code-block-viewer Copia 50"/><text:span text:style-name="Source_20_Text">return Card(</text:span></text:p>
        <text:p text:style-name="P80"><text:span text:style-name="Source_20_Text"><text:s text:c="2"/>color: cardColor,</text:span></text:p>
        <text:p text:style-name="P80"><text:span text:style-name="Source_20_Text">)</text:span></text:p>
      </text:section>
      <text:p text:style-name="P63"/>
      <text:h text:style-name="P83" text:outline-level="2">Resultado UX</text:h>
      <text:p text:style-name="P30">La clasificación pasó de ser:</text:p>
      <text:section text:style-name="Sect1" text:name="Sección39">
        <text:p text:style-name="P64"><text:bookmark text:name="code-block-viewer Copia 51"/><text:span text:style-name="Source_20_Text">lista de equipos</text:span></text:p>
      </text:section>
      <text:p text:style-name="P30">a:</text:p>
      <text:section text:style-name="Sect1" text:name="Sección40">
        <text:p text:style-name="P64"><text:bookmark text:name="code-block-viewer Copia 52"/><text:span text:style-name="Source_20_Text">tabla competitiva real</text:span></text:p>
      </text:section>
      <text:p text:style-name="P30">Ahora el usuario entiende instantáneamente:</text:p>
      <text:list text:style-name="L44">
        <text:list-item>
          <text:p text:style-name="P102">quién domina la competición, </text:p>
        </text:list-item>
        <text:list-item>
          <text:p text:style-name="P102">quién entra directo, </text:p>
        </text:list-item>
        <text:list-item>
          <text:p text:style-name="P102">quién está en Play-In, </text:p>
        </text:list-item>
        <text:list-item>
          <text:p text:style-name="P103">y quién está fuera. </text:p>
        </text:list-item>
      </text:list>
      <text:p text:style-name="P30">Sin necesidad de leer explicaciones.</text:p>
      <text:p text:style-name="P63"/>
      <text:h text:style-name="P58" text:outline-level="1">🧠 3. Debate importante de diseño UX/UI</text:h>
      <text:p text:style-name="P30">Durante la sesión se discutieron varias ideas avanzadas para la futura pantalla de comparación estadística:</text:p>
      <text:h text:style-name="P83" text:outline-level="2">Opción A:</text:h>
      <text:p text:style-name="P30">Scroll vertical mostrando múltiples estadísticas.</text:p>
      <text:h text:style-name="P83" text:outline-level="2">Opción B:</text:h>
      <text:p text:style-name="P30">Scroll horizontal mostrando comparativas una a una:</text:p>
      <text:list text:style-name="L45">
        <text:list-item>
          <text:p text:style-name="P104">Wins vs Wins </text:p>
        </text:list-item>
        <text:list-item>
          <text:p text:style-name="P104">Losses vs Losses </text:p>
        </text:list-item>
        <text:list-item>
          <text:p text:style-name="P104">Offensive Rating vs Offensive Rating </text:p>
        </text:list-item>
        <text:list-item>
          <text:p text:style-name="P105">etc. </text:p>
        </text:list-item>
      </text:list>
      <text:p text:style-name="P30">Finalmente se decidió una:</text:p>
      <text:h text:style-name="P58" text:outline-level="1">solución híbrida.</text:h>
      <text:p text:style-name="P30">La idea conceptual futura será:</text:p>
      <text:list text:style-name="L46">
        <text:list-item>
          <text:p text:style-name="P106"><text:soft-page-break/>logos fijos arriba, </text:p>
        </text:list-item>
        <text:list-item>
          <text:p text:style-name="P106">estadísticas comparativas deslizando, </text:p>
        </text:list-item>
        <text:list-item>
          <text:p text:style-name="P106">foco visual claro, </text:p>
        </text:list-item>
        <text:list-item>
          <text:p text:style-name="P107">y diseño tipo analytics/scouting. </text:p>
        </text:list-item>
      </text:list>
      <text:p text:style-name="P30">Este debate fue importante porque empezó a definirse la identidad real del producto:</text:p>
      <text:h text:style-name="P58" text:outline-level="1">no una app de resultados,</text:h>
      <text:p text:style-name="P30">sino una app de análisis avanzado y scouting.</text:p>
      <text:p text:style-name="P63"/>
      <text:h text:style-name="P58" text:outline-level="1">🏀 4. Rebranding completo de la aplicación</text:h>
      <text:p text:style-name="P30">Uno de los pasos más importantes del proyecto hasta ahora.</text:p>
      <text:h text:style-name="P83" text:outline-level="2">Cambio de nombre:</text:h>
      <text:p text:style-name="P30">Se abandonó el concepto:</text:p>
      <text:section text:style-name="Sect1" text:name="Sección41">
        <text:p text:style-name="P64"><text:bookmark text:name="code-block-viewer Copia 53"/><text:span text:style-name="Source_20_Text">EuroLeague Predictor</text:span></text:p>
      </text:section>
      <text:p text:style-name="P30">porque sonaba demasiado:</text:p>
      <text:list text:style-name="L47">
        <text:list-item>
          <text:p text:style-name="P108">simple, </text:p>
        </text:list-item>
        <text:list-item>
          <text:p text:style-name="P108">orientado a apuestas, </text:p>
        </text:list-item>
        <text:list-item>
          <text:p text:style-name="P109">limitado. </text:p>
        </text:list-item>
      </text:list>
      <text:p text:style-name="P30">Tras varias propuestas:</text:p>
      <text:list text:style-name="L48">
        <text:list-item>
          <text:p text:style-name="P110">EuroLeague Advanced Stats </text:p>
        </text:list-item>
        <text:list-item>
          <text:p text:style-name="P110">EuroLeague Advanced </text:p>
        </text:list-item>
        <text:list-item>
          <text:p text:style-name="P110">EL Advanced </text:p>
        </text:list-item>
        <text:list-item>
          <text:p text:style-name="P111">EuroLeague Insight </text:p>
        </text:list-item>
      </text:list>
      <text:p text:style-name="P30">se eligió finalmente:</text:p>
      <text:h text:style-name="P58" text:outline-level="1">✅ EuroLeague Insight</text:h>
      <text:p text:style-name="P63"/>
      <text:h text:style-name="P83" text:outline-level="2">Motivos de la elección</text:h>
      <text:p text:style-name="P30">El nombre transmite:</text:p>
      <text:list text:style-name="L49">
        <text:list-item>
          <text:p text:style-name="P112">análisis, </text:p>
        </text:list-item>
        <text:list-item>
          <text:p text:style-name="P112">scouting, </text:p>
        </text:list-item>
        <text:list-item>
          <text:p text:style-name="P112">inteligencia deportiva, </text:p>
        </text:list-item>
        <text:list-item>
          <text:p text:style-name="P112">estadísticas avanzadas, </text:p>
        </text:list-item>
        <text:list-item>
          <text:p text:style-name="P113">producto premium. </text:p>
        </text:list-item>
      </text:list>
      <text:p text:style-name="P30">Además deja espacio para crecer en el futuro:</text:p>
      <text:list text:style-name="L50">
        <text:list-item>
          <text:p text:style-name="P114">IA, </text:p>
        </text:list-item>
        <text:list-item>
          <text:p text:style-name="P114">visualización avanzada, </text:p>
        </text:list-item>
        <text:list-item>
          <text:p text:style-name="P114">métricas, </text:p>
        </text:list-item>
        <text:list-item>
          <text:p text:style-name="P114">tendencias, </text:p>
        </text:list-item>
        <text:list-item>
          <text:p text:style-name="P114">scouting de jugadores, </text:p>
        </text:list-item>
        <text:list-item>
          <text:p text:style-name="P114">momentum, </text:p>
        </text:list-item>
        <text:list-item>
          <text:p text:style-name="P115">etc. </text:p>
        </text:list-item>
      </text:list>
      <text:p text:style-name="P63"><text:soft-page-break/></text:p>
      <text:h text:style-name="P58" text:outline-level="1">🎨 5. Diseño del logo oficial</text:h>
      <text:p text:style-name="P30">Se trabajó intensamente en la creación del branding visual.</text:p>
      <text:h text:style-name="P83" text:outline-level="2">Evolución del logo:</text:h>
      <text:list text:style-name="L51">
        <text:list-item>
          <text:p text:style-name="P116">Primera versión con “Predictor”. </text:p>
        </text:list-item>
        <text:list-item>
          <text:p text:style-name="P116">Eliminación de la letra “E”. </text:p>
        </text:list-item>
        <text:list-item>
          <text:p text:style-name="P116">Integración del balón como elemento principal. </text:p>
        </text:list-item>
        <text:list-item>
          <text:p text:style-name="P116">Integración de elementos analytics: </text:p>
          <text:list>
            <text:list-item>
              <text:p text:style-name="P116">barras estadísticas, </text:p>
            </text:list-item>
            <text:list-item>
              <text:p text:style-name="P116">gráficos ascendentes. </text:p>
            </text:list-item>
          </text:list>
        </text:list-item>
        <text:list-item>
          <text:p text:style-name="P116">Integración sutil de una copa/trofeo. </text:p>
        </text:list-item>
        <text:list-item>
          <text:p text:style-name="P117">Ajustes de composición para launcher icon Android. </text:p>
        </text:list-item>
      </text:list>
      <text:p text:style-name="P63"/>
      <text:h text:style-name="P83" text:outline-level="2">Resultado final:</text:h>
      <text:p text:style-name="P30">Un logo:</text:p>
      <text:list text:style-name="L52">
        <text:list-item>
          <text:p text:style-name="P118">negro y naranja, </text:p>
        </text:list-item>
        <text:list-item>
          <text:p text:style-name="P118">moderno, </text:p>
        </text:list-item>
        <text:list-item>
          <text:p text:style-name="P118">deportivo, </text:p>
        </text:list-item>
        <text:list-item>
          <text:p text:style-name="P118">premium, </text:p>
        </text:list-item>
        <text:list-item>
          <text:p text:style-name="P118">muy inspirado en apps tipo: </text:p>
          <text:list>
            <text:list-item>
              <text:p text:style-name="P118">ESPN, </text:p>
            </text:list-item>
            <text:list-item>
              <text:p text:style-name="P118">SofaScore, </text:p>
            </text:list-item>
            <text:list-item>
              <text:p text:style-name="P118">NBA analytics, </text:p>
            </text:list-item>
            <text:list-item>
              <text:p text:style-name="P119">scouting platforms. </text:p>
            </text:list-item>
          </text:list>
        </text:list-item>
      </text:list>
      <text:p text:style-name="P63"/>
      <text:h text:style-name="P58" text:outline-level="1">📱 6. Integración del icono real Android</text:h>
      <text:p text:style-name="P30">Se implementó por primera vez:</text:p>
      <text:h text:style-name="P58" text:outline-level="1">un launcher icon real.</text:h>
      <text:p text:style-name="P63"/>
      <text:h text:style-name="P83" text:outline-level="2">Tecnologías utilizadas</text:h>
      <text:h text:style-name="P86" text:outline-level="3">Flutter Launcher Icons</text:h>
      <text:p text:style-name="P30">Instalación:</text:p>
      <text:section text:style-name="Sect1" text:name="Sección42">
        <text:p text:style-name="P64"><text:bookmark text:name="code-block-viewer Copia 54"/><text:span text:style-name="Source_20_Text">flutter_launcher_icons: ^0.14.4</text:span></text:p>
      </text:section>
      <text:p text:style-name="P30">Configuración final en <text:span text:style-name="Source_20_Text">pubspec.yaml</text:span>:</text:p>
      <text:section text:style-name="Sect1" text:name="Sección43">
        <text:p text:style-name="P64"><text:bookmark text:name="code-block-viewer Copia 55"/><text:span text:style-name="Source_20_Text">flutter_launcher_icons:</text:span></text:p>
        <text:p text:style-name="P80"><text:span text:style-name="Source_20_Text"><text:s text:c="2"/>android: true</text:span></text:p>
        <text:p text:style-name="P80"><text:span text:style-name="Source_20_Text"><text:s text:c="2"/>ios: true</text:span></text:p>
        <text:p text:style-name="P80"><text:span text:style-name="Source_20_Text"><text:s text:c="2"/>image_path: "assets/app_icon/app_icon.png"</text:span></text:p>
        <text:p text:style-name="P80"><text:span text:style-name="Source_20_Text"><text:s text:c="2"/>adaptive_icon_background: "#000000"</text:span></text:p>
        <text:p text:style-name="P80"><text:soft-page-break/><text:span text:style-name="Source_20_Text"><text:s text:c="2"/>adaptive_icon_foreground: "assets/app_icon/app_icon.png"</text:span></text:p>
      </text:section>
      <text:p text:style-name="P63"/>
      <text:h text:style-name="P58" text:outline-level="1">🧩 7. Problemas encontrados y debugging real</text:h>
      <text:p text:style-name="P30">Durante esta parte del desarrollo aparecieron múltiples problemas reales típicos de Flutter/Android:</text:p>
      <text:h text:style-name="P83" text:outline-level="2">❌ Caché del launcher icon</text:h>
      <text:p text:style-name="P30">Android seguía mostrando:</text:p>
      <text:list text:style-name="L53">
        <text:list-item>
          <text:p text:style-name="P120">iconos antiguos, </text:p>
        </text:list-item>
        <text:list-item>
          <text:p text:style-name="P120">placeholders, </text:p>
        </text:list-item>
        <text:list-item>
          <text:p text:style-name="P121">o iconos de Play Store. </text:p>
        </text:list-item>
      </text:list>
      <text:p text:style-name="P63"/>
      <text:h text:style-name="P83" text:outline-level="2">❌ Splash screen congelada</text:h>
      <text:p text:style-name="P30">La app parecía no arrancar después del <text:span text:style-name="Source_20_Text">wipe data</text:span>.</text:p>
      <text:p text:style-name="P63"/>
      <text:h text:style-name="P83" text:outline-level="2">❌ Problemas adaptive icons Android</text:h>
      <text:p text:style-name="P30">Android estaba recortando excesivamente el logo.</text:p>
      <text:p text:style-name="P63"/>
      <text:h text:style-name="P83" text:outline-level="2">Soluciones aplicadas</text:h>
      <text:h text:style-name="P86" text:outline-level="3">✅ <text:span text:style-name="Source_20_Text">flutter clean</text:span></text:h>
      <text:section text:style-name="Sect1" text:name="Sección44">
        <text:p text:style-name="P64"><text:bookmark text:name="code-block-viewer Copia 56"/><text:span text:style-name="Source_20_Text">flutter clean</text:span></text:p>
      </text:section>
      <text:h text:style-name="P86" text:outline-level="3">✅ Regeneración de paquetes</text:h>
      <text:section text:style-name="Sect1" text:name="Sección45">
        <text:p text:style-name="P64"><text:bookmark text:name="code-block-viewer Copia 57"/><text:span text:style-name="Source_20_Text">flutter pub get</text:span></text:p>
      </text:section>
      <text:h text:style-name="P86" text:outline-level="3">✅ Regeneración de launcher icons</text:h>
      <text:section text:style-name="Sect1" text:name="Sección46">
        <text:p text:style-name="P64"><text:bookmark text:name="code-block-viewer Copia 58"/><text:span text:style-name="Source_20_Text">flutter pub run flutter_launcher_icons</text:span></text:p>
      </text:section>
      <text:h text:style-name="P86" text:outline-level="3">✅ Wipe Data del emulador Pixel</text:h>
      <text:p text:style-name="P30">Esto permitió limpiar completamente:</text:p>
      <text:list text:style-name="L54">
        <text:list-item>
          <text:p text:style-name="P122">cachés Android, </text:p>
        </text:list-item>
        <text:list-item>
          <text:p text:style-name="P122">launcher icons antiguos, </text:p>
        </text:list-item>
        <text:list-item>
          <text:p text:style-name="P123">assets corruptos. </text:p>
        </text:list-item>
      </text:list>
      <text:p text:style-name="P63"/>
      <text:h text:style-name="P58" text:outline-level="1">📱 8. Resultado final del branding</text:h>
      <text:p text:style-name="P30">Finalmente se consiguió:</text:p>
      <text:list text:style-name="L55">
        <text:list-item>
          <text:p text:style-name="P124">logo funcional, </text:p>
        </text:list-item>
        <text:list-item>
          <text:p text:style-name="P124">launcher icon visible, </text:p>
        </text:list-item>
        <text:list-item>
          <text:p text:style-name="P124">branding consistente, </text:p>
        </text:list-item>
        <text:list-item>
          <text:p text:style-name="P125">app reconocible en Android. </text:p>
        </text:list-item>
      </text:list>
      <text:p text:style-name="P30">La aplicación empezó a sentirse:</text:p>
      <text:h text:style-name="P58" text:outline-level="1"><text:soft-page-break/>como un producto real.</text:h>
      <text:p text:style-name="P63"/>
      <text:h text:style-name="P58" text:outline-level="1">🧠 9. Reflexión importante del día</text:h>
      <text:p text:style-name="P30">Hoy se produjo probablemente el mayor salto psicológico del proyecto.</text:p>
      <text:p text:style-name="P30">Hasta ahora el proyecto era:</text:p>
      <text:section text:style-name="Sect1" text:name="Sección47">
        <text:p text:style-name="P64"><text:bookmark text:name="code-block-viewer Copia 59"/><text:span text:style-name="Source_20_Text">pantallas + código</text:span></text:p>
      </text:section>
      <text:p text:style-name="P30">Pero tras:</text:p>
      <text:list text:style-name="L56">
        <text:list-item>
          <text:p text:style-name="P126">el branding, </text:p>
        </text:list-item>
        <text:list-item>
          <text:p text:style-name="P126">el icono Android, </text:p>
        </text:list-item>
        <text:list-item>
          <text:p text:style-name="P126">el naming, </text:p>
        </text:list-item>
        <text:list-item>
          <text:p text:style-name="P126">el launcher real, </text:p>
        </text:list-item>
        <text:list-item>
          <text:p text:style-name="P127">la UX visual, </text:p>
        </text:list-item>
      </text:list>
      <text:p text:style-name="P30">la aplicación empezó a sentirse:</text:p>
      <text:h text:style-name="P58" text:outline-level="1">como una app auténtica instalada en un dispositivo real.</text:h>
      <text:p text:style-name="P30">Ese cambio mental es muy importante en cualquier proyecto de software.</text:p>
      <text:p text:style-name="P63"/>
      <text:h text:style-name="P58" text:outline-level="1">🚀 Próximos pasos previstos</text:h>
      <text:h text:style-name="P83" text:outline-level="2">🔧 Correcciones inmediatas</text:h>
      <text:list text:style-name="L57">
        <text:list-item>
          <text:p text:style-name="P128">Ajustar definitivamente el nombre visible Android. </text:p>
        </text:list-item>
        <text:list-item>
          <text:p text:style-name="P128">Revisar splash screen. </text:p>
        </text:list-item>
        <text:list-item>
          <text:p text:style-name="P129">Optimizar adaptive icon. </text:p>
        </text:list-item>
      </text:list>
      <text:p text:style-name="P63"/>
      <text:h text:style-name="P83" text:outline-level="2">📊 Evolución analytics</text:h>
      <text:list text:style-name="L58">
        <text:list-item>
          <text:p text:style-name="P130">Comparativas estadísticas avanzadas. </text:p>
        </text:list-item>
        <text:list-item>
          <text:p text:style-name="P130">Offensive/Defensive Rating. </text:p>
        </text:list-item>
        <text:list-item>
          <text:p text:style-name="P130">Pace. </text:p>
        </text:list-item>
        <text:list-item>
          <text:p text:style-name="P130">Form. </text:p>
        </text:list-item>
        <text:list-item>
          <text:p text:style-name="P130">Momentum. </text:p>
        </text:list-item>
        <text:list-item>
          <text:p text:style-name="P131">Visualización avanzada. </text:p>
        </text:list-item>
      </text:list>
      <text:p text:style-name="P63"/>
      <text:h text:style-name="P83" text:outline-level="2">🎨 UX/UI futura</text:h>
      <text:list text:style-name="L59">
        <text:list-item>
          <text:p text:style-name="P132">Animaciones suaves. </text:p>
        </text:list-item>
        <text:list-item>
          <text:p text:style-name="P132">Transiciones. </text:p>
        </text:list-item>
        <text:list-item>
          <text:p text:style-name="P132">Cards comparativas premium. </text:p>
        </text:list-item>
        <text:list-item>
          <text:p text:style-name="P132">Gráficas. </text:p>
        </text:list-item>
        <text:list-item>
          <text:p text:style-name="P132">Mini charts. </text:p>
        </text:list-item>
        <text:list-item>
          <text:p text:style-name="P133">Momentum bars. </text:p>
        </text:list-item>
      </text:list>
      <text:p text:style-name="P63"/>
      <text:h text:style-name="P58" text:outline-level="1"><text:soft-page-break/>🏁 Estado actual del proyecto</text:h>
      <text:h text:style-name="P83" text:outline-level="2">EuroLeague Insight ya tiene:</text:h>
      <text:p text:style-name="P30">✅ Branding real<text:line-break/>✅ Launcher icon Android<text:line-break/>✅ Nombre oficial<text:line-break/>✅ Standings completos<text:line-break/>✅ Colores Playoff/Play-In<text:line-break/>✅ Navegación funcional<text:line-break/>✅ Assets organizados<text:line-break/>✅ UX deportiva sólida<text:line-break/>✅ Arquitectura Flutter funcional<text:line-break/>✅ Identidad visual clara</text:p>
      <text:p text:style-name="P30">Y, sobre todo:</text:p>
      <text:h text:style-name="P58" text:outline-level="1">una dirección de producto mucho más definida.</text:h>
      <text:p text:style-name="P93"/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13:23:22.264784700</meta:creation-date>
    <dc:date>2026-05-19T10:23:29.473349000</dc:date>
    <meta:editing-duration>PT13M41S</meta:editing-duration>
    <meta:editing-cycles>4</meta:editing-cycles>
    <meta:generator>LibreOffice/26.2.3.2$Windows_X86_64 LibreOffice_project/70e089b17412e4cb7773e41413306b17a2328c34</meta:generator>
    <meta:document-statistic meta:table-count="0" meta:image-count="0" meta:object-count="0" meta:page-count="22" meta:paragraph-count="615" meta:word-count="2555" meta:character-count="16506" meta:non-whitespace-character-count="14529"/>
  </office:meta>
</office:document-meta>
</file>