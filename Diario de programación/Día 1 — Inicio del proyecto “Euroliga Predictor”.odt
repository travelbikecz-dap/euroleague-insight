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8.149cm" table:align="left"/>
    </style:style>
    <style:style style:name="Tabla1.A" style:family="table-column">
      <style:table-column-properties style:column-width="5.285cm"/>
    </style:style>
    <style:style style:name="Tabla1.B" style:family="table-column">
      <style:table-column-properties style:column-width="2.86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33"/>
    <style:style style:name="P2" style:family="paragraph" style:parent-style-name="Text_20_body" style:list-style-name="L34"/>
    <style:style style:name="P3" style:family="paragraph" style:parent-style-name="Text_20_body" style:list-style-name="L35"/>
    <style:style style:name="P4" style:family="paragraph" style:parent-style-name="Text_20_body" style:list-style-name="L36"/>
    <style:style style:name="P5" style:family="paragraph" style:parent-style-name="Text_20_body" style:list-style-name="L37"/>
    <style:style style:name="P6" style:family="paragraph" style:parent-style-name="Text_20_body" style:list-style-name="L38"/>
    <style:style style:name="P7" style:family="paragraph" style:parent-style-name="Text_20_body" style:list-style-name="L39"/>
    <style:style style:name="P8" style:family="paragraph" style:parent-style-name="Text_20_body" style:list-style-name="L40"/>
    <style:style style:name="P9" style:family="paragraph" style:parent-style-name="Text_20_body" style:list-style-name="L41"/>
    <style:style style:name="P10" style:family="paragraph" style:parent-style-name="Text_20_body" style:list-style-name="L42"/>
    <style:style style:name="P11" style:family="paragraph" style:parent-style-name="Text_20_body" style:list-style-name="L43"/>
    <style:style style:name="P12" style:family="paragraph" style:parent-style-name="Text_20_body" style:list-style-name="L44"/>
    <style:style style:name="P13" style:family="paragraph" style:parent-style-name="Text_20_body" style:list-style-name="L45"/>
    <style:style style:name="P14" style:family="paragraph" style:parent-style-name="Text_20_body" style:list-style-name="L46"/>
    <style:style style:name="P15" style:family="paragraph" style:parent-style-name="Text_20_body" style:list-style-name="L47"/>
    <style:style style:name="P16" style:family="paragraph" style:parent-style-name="Text_20_body" style:list-style-name="L48"/>
    <style:style style:name="P17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? Día 1 — Inicio del proyecto “Euroliga Predictor” ?</text:h>
      <text:p text:style-name="Text_20_body">Hoy comenzó oficialmente el desarrollo de mi primera aplicación móvil Android utilizando Flutter.<text:line-break/>El objetivo del proyecto es crear una app especializada en análisis y predicción de partidos de la Euroliga de baloncesto, combinando estadísticas avanzadas, contexto táctico y análisis predictivo explicado de forma visual y comprensible para el usuario.</text:p>
      <text:p text:style-name="Horizontal_20_Line"/>
      <text:h text:style-name="Heading_20_1" text:outline-level="1">? Idea principal de la aplicación</text:h>
      <text:p text:style-name="Text_20_body">La app pretende ayudar a analizar enfrentamientos de Euroliga y estimar las probabilidades de victoria de cada equipo utilizando datos estadísticos reales y contexto deportivo.</text:p>
      <text:p text:style-name="Text_20_body">La idea no es simplemente mostrar un porcentaje, sino explicar claramente por qué el modelo considera favorito a un equipo.</text:p>
      <text:p text:style-name="Horizontal_20_Line"/>
      <text:h text:style-name="Heading_20_1" text:outline-level="1">? Concepto general de la app</text:h>
      <text:h text:style-name="Heading_20_2" text:outline-level="2">Funcionalidad principal</text:h>
      <text:p text:style-name="Text_20_body">El usuario seleccionará:</text:p>
      <text:list xml:id="list2496248954823365799" text:style-name="L33">
        <text:list-item>
          <text:p text:style-name="P1">Equipo local</text:p>
        </text:list-item>
        <text:list-item>
          <text:p text:style-name="P1">Equipo visitante</text:p>
        </text:list-item>
      </text:list>
      <text:p text:style-name="Text_20_body">Y la aplicación devolverá:</text:p>
      <text:list xml:id="list7683780429674489761" text:style-name="L34">
        <text:list-item>
          <text:p text:style-name="P2">Probabilidad de victoria de cada equipo</text:p>
        </text:list-item>
        <text:list-item>
          <text:p text:style-name="P2">Predicción del ganador</text:p>
        </text:list-item>
        <text:list-item>
          <text:p text:style-name="P2">Explicación basada en métricas avanzadas</text:p>
        </text:list-item>
        <text:list-item>
          <text:p text:style-name="P2">Factores contextuales relevantes</text:p>
        </text:list-item>
      </text:list>
      <text:p text:style-name="Horizontal_20_Line"/>
      <text:h text:style-name="Heading_20_1" text:outline-level="1">? Métricas previstas inicialmente</text:h>
      <text:h text:style-name="Heading_20_2" text:outline-level="2">Estadísticas avanzadas</text:h>
      <text:list xml:id="list832004827351283070" text:style-name="L35">
        <text:list-item>
          <text:p text:style-name="P3">Offensive Rating</text:p>
        </text:list-item>
        <text:list-item>
          <text:p text:style-name="P3">Defensive Rating</text:p>
        </text:list-item>
        <text:list-item>
          <text:p text:style-name="P3">Net Rating</text:p>
        </text:list-item>
        <text:list-item>
          <text:p text:style-name="P3">Pace</text:p>
        </text:list-item>
        <text:list-item>
          <text:p text:style-name="P3"><text:soft-page-break/>Effective FG%</text:p>
        </text:list-item>
        <text:list-item>
          <text:p text:style-name="P3">True Shooting %</text:p>
        </text:list-item>
        <text:list-item>
          <text:p text:style-name="P3">Assist/Turnover Ratio</text:p>
        </text:list-item>
        <text:list-item>
          <text:p text:style-name="P3">Offensive Rebound %</text:p>
        </text:list-item>
        <text:list-item>
          <text:p text:style-name="P3">Defensive Rebound %</text:p>
        </text:list-item>
        <text:list-item>
          <text:p text:style-name="P3">Turnover %</text:p>
        </text:list-item>
      </text:list>
      <text:p text:style-name="Horizontal_20_Line"/>
      <text:h text:style-name="Heading_20_2" text:outline-level="2">Factores contextuales</text:h>
      <text:list xml:id="list9128523978217948575" text:style-name="L36">
        <text:list-item>
          <text:p text:style-name="P4">Forma últimos 5 partidos</text:p>
        </text:list-item>
        <text:list-item>
          <text:p text:style-name="P4">Rendimiento local/visitante</text:p>
        </text:list-item>
        <text:list-item>
          <text:p text:style-name="P4">Historial entre equipos</text:p>
        </text:list-item>
        <text:list-item>
          <text:p text:style-name="P4">Lesiones importantes</text:p>
        </text:list-item>
        <text:list-item>
          <text:p text:style-name="P4">Profundidad de banquillo</text:p>
        </text:list-item>
        <text:list-item>
          <text:p text:style-name="P4">Impacto de jugadores clave</text:p>
        </text:list-item>
        <text:list-item>
          <text:p text:style-name="P4">Fatiga y dobles jornadas</text:p>
        </text:list-item>
        <text:list-item>
          <text:p text:style-name="P4">Momentum competitivo</text:p>
        </text:list-item>
      </text:list>
      <text:p text:style-name="Horizontal_20_Line"/>
      <text:h text:style-name="Heading_20_1" text:outline-level="1">? Filosofía de la app</text:h>
      <text:p text:style-name="Text_20_body">La idea no es competir directamente con apps de apuestas o modelos opacos de IA.</text:p>
      <text:p text:style-name="Text_20_body">El objetivo es crear una herramienta:</text:p>
      <text:list xml:id="list8369744953390502645" text:style-name="L37">
        <text:list-item>
          <text:p text:style-name="P5">visual,</text:p>
        </text:list-item>
        <text:list-item>
          <text:p text:style-name="P5">clara,</text:p>
        </text:list-item>
        <text:list-item>
          <text:p text:style-name="P5">explicativa,</text:p>
        </text:list-item>
        <text:list-item>
          <text:p text:style-name="P5">y centrada en la Euroliga.</text:p>
        </text:list-item>
      </text:list>
      <text:p text:style-name="Text_20_body">Se busca que el usuario entienda:</text:p>
      <text:p text:style-name="Quotations">“por qué el modelo cree que un equipo tiene ventaja”.</text:p>
      <text:p text:style-name="Horizontal_20_Line"/>
      <text:h text:style-name="Heading_20_1" text:outline-level="1">? Investigación realizada</text:h>
      <text:p text:style-name="Text_20_body">Durante el día se investigaron:</text:p>
      <text:list xml:id="list6778981978971750604" text:style-name="L38">
        <text:list-item>
          <text:p text:style-name="P6">APIs deportivas</text:p>
        </text:list-item>
        <text:list-item>
          <text:p text:style-name="P6">Apps similares</text:p>
        </text:list-item>
        <text:list-item>
          <text:p text:style-name="P6"><text:soft-page-break/>proyectos de sports analytics</text:p>
        </text:list-item>
        <text:list-item>
          <text:p text:style-name="P6">herramientas existentes de predicción Euroliga</text:p>
        </text:list-item>
      </text:list>
      <text:p text:style-name="Horizontal_20_Line"/>
      <text:h text:style-name="Heading_20_1" text:outline-level="1">? Descubrimientos importantes</text:h>
      <text:h text:style-name="Heading_20_2" text:outline-level="2">Repositorio encontrado:</text:h>
      <text:h text:style-name="Heading_20_3" text:outline-level="3"><text:span text:style-name="Source_20_Text">giasemidis/euroleague_api</text:span></text:h>
      <text:p text:style-name="Text_20_body">GitHub:<text:line-break/><text:a xlink:type="simple" xlink:href="https://github.com/giasemidis/euroleague_api?utm_source=chatgpt.com" text:style-name="Internet_20_link" text:visited-style-name="Visited_20_Internet_20_Link">Euroleague API Github</text:a></text:p>
      <text:p text:style-name="Text_20_body">Este proyecto proporciona acceso a:</text:p>
      <text:list xml:id="list2166098499010242892" text:style-name="L39">
        <text:list-item>
          <text:p text:style-name="P7">estadísticas de Euroliga,</text:p>
        </text:list-item>
        <text:list-item>
          <text:p text:style-name="P7">boxscores,</text:p>
        </text:list-item>
        <text:list-item>
          <text:p text:style-name="P7">play-by-play,</text:p>
        </text:list-item>
        <text:list-item>
          <text:p text:style-name="P7">standings,</text:p>
        </text:list-item>
        <text:list-item>
          <text:p text:style-name="P7">datos de jugadores y equipos.</text:p>
        </text:list-item>
      </text:list>
      <text:p text:style-name="Horizontal_20_Line"/>
      <text:h text:style-name="Heading_20_2" text:outline-level="2">Descubrimiento clave</text:h>
      <text:p text:style-name="Text_20_body">También se encontraron proyectos de análisis predictivo Euroliga basados en Python y Machine Learning.</text:p>
      <text:p text:style-name="Text_20_body">Conclusión importante del día:</text:p>
      <text:p text:style-name="Quotations">La idea general de predicción deportiva ya existe en parte, pero todavía hay margen para crear una experiencia móvil moderna, visual y explicativa centrada específicamente en Euroliga.</text:p>
      <text:p text:style-name="Horizontal_20_Line"/>
      <text:h text:style-name="Heading_20_1" text:outline-level="1">? Decisiones técnicas tomadas</text:h>
      <text:h text:style-name="Heading_20_2" text:outline-level="2">Stack principal elegido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Área</text:p>
            </table:table-cell>
            <table:table-cell table:style-name="Tabla1.A1" office:value-type="string">
              <text:p text:style-name="Table_20_Heading">Tecnología</text:p>
            </table:table-cell>
          </table:table-row>
        </table:table-header-rows>
        <table:table-row>
          <table:table-cell table:style-name="Tabla1.A1" office:value-type="string">
            <text:p text:style-name="Table_20_Contents">Frontend App</text:p>
          </table:table-cell>
          <table:table-cell table:style-name="Tabla1.A1" office:value-type="string">
            <text:p text:style-name="Table_20_Contents">Flutter</text:p>
          </table:table-cell>
        </table:table-row>
        <table:table-row>
          <table:table-cell table:style-name="Tabla1.A1" office:value-type="string">
            <text:p text:style-name="Table_20_Contents">Editor código</text:p>
          </table:table-cell>
          <table:table-cell table:style-name="Tabla1.A1" office:value-type="string">
            <text:p text:style-name="Table_20_Contents">VS Code</text:p>
          </table:table-cell>
        </table:table-row>
        <table:table-row>
          <table:table-cell table:style-name="Tabla1.A1" office:value-type="string">
            <text:p text:style-name="Table_20_Contents">SDK Android</text:p>
          </table:table-cell>
          <table:table-cell table:style-name="Tabla1.A1" office:value-type="string">
            <text:p text:style-name="Table_20_Contents">Android Studio</text:p>
          </table:table-cell>
        </table:table-row>
        <table:table-row>
          <table:table-cell table:style-name="Tabla1.A1" office:value-type="string">
            <text:p text:style-name="Table_20_Contents">Backend futuro</text:p>
          </table:table-cell>
          <table:table-cell table:style-name="Tabla1.A1" office:value-type="string">
            <text:p text:style-name="Table_20_Contents">Firebase</text:p>
          </table:table-cell>
        </table:table-row>
        <table:table-row>
          <table:table-cell table:style-name="Tabla1.A1" office:value-type="string">
            <text:p text:style-name="Table_20_Contents">Repositorio</text:p>
          </table:table-cell>
          <table:table-cell table:style-name="Tabla1.A1" office:value-type="string">
            <text:p text:style-name="Table_20_Contents">GitHub</text:p>
          </table:table-cell>
        </table:table-row>
        <text:soft-page-break/>
        <table:table-row>
          <table:table-cell table:style-name="Tabla1.A1" office:value-type="string">
            <text:p text:style-name="Table_20_Contents">Posible motor analytics futuro</text:p>
          </table:table-cell>
          <table:table-cell table:style-name="Tabla1.A1" office:value-type="string">
            <text:p text:style-name="Table_20_Contents">Python</text:p>
          </table:table-cell>
        </table:table-row>
      </table:table>
      <text:p text:style-name="Horizontal_20_Line"/>
      <text:h text:style-name="Heading_20_1" text:outline-level="1">⚙️ Instalaciones y configuración realizadas</text:h>
      <text:h text:style-name="Heading_20_2" text:outline-level="2">✅ Instalado:</text:h>
      <text:list xml:id="list250522144564901232" text:style-name="L40">
        <text:list-item>
          <text:p text:style-name="P8">Git</text:p>
        </text:list-item>
        <text:list-item>
          <text:p text:style-name="P8">VS Code</text:p>
        </text:list-item>
        <text:list-item>
          <text:p text:style-name="P8">Android Studio</text:p>
        </text:list-item>
        <text:list-item>
          <text:p text:style-name="P8">Flutter SDK</text:p>
        </text:list-item>
      </text:list>
      <text:p text:style-name="Horizontal_20_Line"/>
      <text:h text:style-name="Heading_20_2" text:outline-level="2">✅ Configurado:</text:h>
      <text:list xml:id="list3229818947689137652" text:style-name="L41">
        <text:list-item>
          <text:p text:style-name="P9">Variables PATH de Flutter</text:p>
        </text:list-item>
        <text:list-item>
          <text:p text:style-name="P9">Android SDK</text:p>
        </text:list-item>
        <text:list-item>
          <text:p text:style-name="P9">Android licenses</text:p>
        </text:list-item>
        <text:list-item>
          <text:p text:style-name="P9">Android emulator</text:p>
        </text:list-item>
        <text:list-item>
          <text:p text:style-name="P9">Flutter Doctor</text:p>
        </text:list-item>
      </text:list>
      <text:p text:style-name="Horizontal_20_Line"/>
      <text:h text:style-name="Heading_20_2" text:outline-level="2">✅ Creado:</text:h>
      <text:list xml:id="list5191218263559263074" text:style-name="L42">
        <text:list-item>
          <text:p text:style-name="P10">Primer proyecto Flutter:</text:p>
        </text:list-item>
      </text:list>
      <text:p text:style-name="P17"><text:span text:style-name="Source_20_Text">euroliga_predictor</text:span></text:p>
      <text:p text:style-name="Horizontal_20_Line"/>
      <text:h text:style-name="Heading_20_1" text:outline-level="1">? Emulador Android configurado</text:h>
      <text:p text:style-name="Text_20_body">Se configuró y ejecutó:</text:p>
      <text:list xml:id="list6598134121767451069" text:style-name="L43">
        <text:list-item>
          <text:p text:style-name="P11">Pixel 8 virtual</text:p>
        </text:list-item>
        <text:list-item>
          <text:p text:style-name="P11">Android 14</text:p>
        </text:list-item>
      </text:list>
      <text:p text:style-name="Text_20_body">El emulador Android quedó completamente operativo.</text:p>
      <text:p text:style-name="Horizontal_20_Line"/>
      <text:h text:style-name="Heading_20_1" text:outline-level="1"><text:soft-page-break/>? Primer gran logro técnico</text:h>
      <text:h text:style-name="Heading_20_2" text:outline-level="2">Primera compilación Android exitosa</text:h>
      <text:p text:style-name="Text_20_body">Comando ejecutado:</text:p>
      <text:p text:style-name="P17"><text:span text:style-name="Source_20_Text">flutter run</text:span></text:p>
      <text:p text:style-name="Text_20_body">Resultado:</text:p>
      <text:list xml:id="list7035171157798666433" text:style-name="L44">
        <text:list-item>
          <text:p text:style-name="P12">compilación correcta,</text:p>
        </text:list-item>
        <text:list-item>
          <text:p text:style-name="P12">generación APK,</text:p>
        </text:list-item>
        <text:list-item>
          <text:p text:style-name="P12">instalación automática en Android virtual,</text:p>
        </text:list-item>
        <text:list-item>
          <text:p text:style-name="P12">primera app Flutter ejecutándose correctamente.</text:p>
        </text:list-item>
      </text:list>
      <text:p text:style-name="Horizontal_20_Line"/>
      <text:h text:style-name="Heading_20_1" text:outline-level="1">? Problemas técnicos solucionados</text:h>
      <text:p text:style-name="Text_20_body">Durante el setup se resolvieron:</text:p>
      <text:list xml:id="list4024315443906123820" text:style-name="L45">
        <text:list-item>
          <text:p text:style-name="P13">Flutter no detectado en PATH</text:p>
        </text:list-item>
        <text:list-item>
          <text:p text:style-name="P13">instalación incompleta por falta de espacio</text:p>
        </text:list-item>
        <text:list-item>
          <text:p text:style-name="P13">Android SDK command-line tools</text:p>
        </text:list-item>
        <text:list-item>
          <text:p text:style-name="P13">licencias Android</text:p>
        </text:list-item>
        <text:list-item>
          <text:p text:style-name="P13">error NDK corrupto</text:p>
        </text:list-item>
        <text:list-item>
          <text:p text:style-name="P13">error de espacio insuficiente</text:p>
        </text:list-item>
        <text:list-item>
          <text:p text:style-name="P13">problemas de Gradle</text:p>
        </text:list-item>
        <text:list-item>
          <text:p text:style-name="P13">configuración del emulador</text:p>
        </text:list-item>
      </text:list>
      <text:p text:style-name="Horizontal_20_Line"/>
      <text:h text:style-name="Heading_20_1" text:outline-level="1">? Aprendizajes importantes del día</text:h>
      <text:h text:style-name="Heading_20_2" text:outline-level="2">Conceptos comprendidos:</text:h>
      <text:list xml:id="list7506379411077719081" text:style-name="L46">
        <text:list-item>
          <text:p text:style-name="P14">Flutter SDK</text:p>
        </text:list-item>
        <text:list-item>
          <text:p text:style-name="P14">Android SDK</text:p>
        </text:list-item>
        <text:list-item>
          <text:p text:style-name="P14">PATH</text:p>
        </text:list-item>
        <text:list-item>
          <text:p text:style-name="P14">Gradle</text:p>
        </text:list-item>
        <text:list-item>
          <text:p text:style-name="P14">Emulador Android</text:p>
        </text:list-item>
        <text:list-item>
          <text:p text:style-name="P14">VS Code como entorno principal</text:p>
        </text:list-item>
        <text:list-item>
          <text:p text:style-name="P14">estructura básica de un proyecto Flutter</text:p>
        </text:list-item>
        <text:list-item>
          <text:p text:style-name="P14"><text:soft-page-break/>función de GitHub y Firebase dentro de la arquitectura futura</text:p>
        </text:list-item>
      </text:list>
      <text:p text:style-name="Horizontal_20_Line"/>
      <text:h text:style-name="Heading_20_1" text:outline-level="1">? Estado actual del proyecto</text:h>
      <text:h text:style-name="Heading_20_2" text:outline-level="2">✅ Completamente funcional:</text:h>
      <text:list xml:id="list1671043710184578011" text:style-name="L47">
        <text:list-item>
          <text:p text:style-name="P15">entorno Flutter</text:p>
        </text:list-item>
        <text:list-item>
          <text:p text:style-name="P15">compilación Android</text:p>
        </text:list-item>
        <text:list-item>
          <text:p text:style-name="P15">emulador</text:p>
        </text:list-item>
        <text:list-item>
          <text:p text:style-name="P15">proyecto base</text:p>
        </text:list-item>
      </text:list>
      <text:p text:style-name="Horizontal_20_Line"/>
      <text:h text:style-name="Heading_20_1" text:outline-level="1">? Objetivo para el Día 2</text:h>
      <text:h text:style-name="Heading_20_2" text:outline-level="2">Comenzar el desarrollo real de la interfaz.</text:h>
      <text:p text:style-name="Text_20_body">Primer MVP previsto:</text:p>
      <text:list xml:id="list5871757195424175765" text:style-name="L48">
        <text:list-item>
          <text:p text:style-name="P16">pantalla inicial</text:p>
        </text:list-item>
        <text:list-item>
          <text:p text:style-name="P16">título “Euroliga Predictor”</text:p>
        </text:list-item>
        <text:list-item>
          <text:p text:style-name="P16">selector de equipos</text:p>
        </text:list-item>
        <text:list-item>
          <text:p text:style-name="P16">botón “Analizar partido”</text:p>
        </text:list-item>
        <text:list-item>
          <text:p text:style-name="P16">primeros datos simulados</text:p>
        </text:list-item>
      </text:list>
      <text:p text:style-name="Horizontal_20_Line"/>
      <text:h text:style-name="Heading_20_1" text:outline-level="1">? Conclusión del Día 1</text:h>
      <text:p text:style-name="Text_20_body">Aunque gran parte del tiempo se dedicó a instalaciones y configuración, hoy se logró construir desde cero un entorno profesional completo de desarrollo Android con Flutter.</text:p>
      <text:p text:style-name="Text_20_body">El proyecto dejó de ser solamente una idea y pasó a convertirse en una aplicación real ejecutándose dentro de un dispositivo Android virtual.</text:p>
      <text:p text:style-name="Text_20_body">Primer día completado ✅?￰ﾟﾚ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0S</meta:editing-duration>
    <meta:editing-cycles>3</meta:editing-cycles>
    <meta:generator>OpenOffice/4.1.16$Win32 OpenOffice.org_project/4116m3$Build-9816</meta:generator>
    <dc:date>2026-05-17T16:14:29.09</dc:date>
    <meta:document-statistic meta:table-count="1" meta:image-count="0" meta:object-count="0" meta:page-count="6" meta:paragraph-count="148" meta:word-count="718" meta:character-count="4458"/>
    <dc:creator>Daniel Alvarez Perez</dc:creator>
    <meta:user-defined meta:name="Info 1"/>
    <meta:user-defined meta:name="Info 2"/>
    <meta:user-defined meta:name="Info 3"/>
    <meta:user-defined meta:name="Info 4"/>
  </office:meta>
</office:document-meta>
</file>