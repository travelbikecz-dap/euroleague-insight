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top="0cm" fo:margin-bottom="0.212cm" style:contextual-spacing="false"/>
    </style:style>
    <style:style style:name="P2" style:family="paragraph" style:parent-style-name="Horizontal_20_Line">
      <style:paragraph-properties fo:margin-top="0cm" fo:margin-bottom="0.212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Preformatted_20_Text">
      <style:paragraph-properties fo:margin-top="0cm" fo:margin-bottom="0.212cm" style:contextual-spacing="false"/>
    </style:style>
    <style:style style:name="P6" style:family="paragraph" style:parent-style-name="Quotations">
      <style:paragraph-properties fo:margin-top="0cm" fo:margin-bottom="0.212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🏀 Devlog #1 — Primera versión funcional de la app EuroLeague Predictor 🚀</text:h>
      <text:p text:style-name="Text_20_body">Hoy no ha sido simplemente “instalar Flutter”.<text:line-break/>Hoy ha sido el primer día real de construcción de una aplicación móvil propia y el inicio práctico del proyecto <text:span text:style-name="Strong_20_Emphasis">EuroLeague Predictor</text:span>.</text:p>
      <text:p text:style-name="Text_20_body">La idea inicial era construir una aplicación moderna relacionada con la EuroLeague, centrada en resultados, partidos, estadísticas y futuras posibilidades como predicciones, favoritos o integración de IA.</text:p>
      <text:p text:style-name="Text_20_body">Sin embargo, lo verdaderamente importante del día no fue únicamente el resultado visual final, sino descubrir cómo se construye una aplicación Flutter real desde prácticamente cero.</text:p>
      <text:p text:style-name="P2"/>
      <text:h text:style-name="P1" text:outline-level="1">⚙️ Inicio de la sesión — Preparando el entorno</text:h>
      <text:p text:style-name="Text_20_body">La sesión comenzó con el proyecto completamente vacío.</text:p>
      <text:p text:style-name="Text_20_body">El primer objetivo fue entender:</text:p>
      <text:list text:style-name="L1">
        <text:list-item>
          <text:p text:style-name="P3">cómo funciona Flutter,</text:p>
        </text:list-item>
        <text:list-item>
          <text:p text:style-name="P3">cómo se estructura una app,</text:p>
        </text:list-item>
        <text:list-item>
          <text:p text:style-name="P3">cómo compilar Android,</text:p>
        </text:list-item>
        <text:list-item>
          <text:p text:style-name="P3">y cómo trabajar con el emulador.</text:p>
        </text:list-item>
      </text:list>
      <text:p text:style-name="Text_20_body">Durante esta fase fui guiado paso a paso para:</text:p>
      <text:list text:style-name="L2">
        <text:list-item>
          <text:p text:style-name="P4">abrir correctamente el proyecto en Visual Studio Code,</text:p>
        </text:list-item>
        <text:list-item>
          <text:p text:style-name="P4">entender la estructura del proyecto Flutter,</text:p>
        </text:list-item>
        <text:list-item>
          <text:p text:style-name="P4">abrir la terminal integrada,</text:p>
        </text:list-item>
        <text:list-item>
          <text:p text:style-name="P4">crear carpetas organizadas,</text:p>
        </text:list-item>
        <text:list-item>
          <text:p text:style-name="P4">y lanzar la primera compilación Android.</text:p>
        </text:list-item>
      </text:list>
      <text:p text:style-name="Text_20_body">Se creó la primera estructura básica del proyecto:</text:p>
      <text:p text:style-name="P5"><text:span text:style-name="Source_20_Text">lib/</text:span></text:p>
      <text:p text:style-name="P5"><text:span text:style-name="Source_20_Text"><text:s/>├── models/</text:span></text:p>
      <text:p text:style-name="P5"><text:span text:style-name="Source_20_Text"><text:s/>├── services/</text:span></text:p>
      <text:p text:style-name="P5"><text:span text:style-name="Source_20_Text"><text:s/>├── screens/</text:span></text:p>
      <text:p text:style-name="P5"><text:span text:style-name="Source_20_Text"><text:s/>├── widgets/</text:span></text:p>
      <text:p text:style-name="P5"><text:span text:style-name="Source_20_Text"><text:s/>└── theme/</text:span></text:p>
      <text:p text:style-name="Text_20_body">Aquí apareció una de las primeras ideas importantes del desarrollo moderno:</text:p>
      <text:p text:style-name="P6">no construir “todo mezclado”, sino separar responsabilidades desde el principio.</text:p>
      <text:p text:style-name="P2"/>
      <text:h text:style-name="P1" text:outline-level="1">📱 Primera ejecución real de Flutter</text:h>
      <text:p text:style-name="Text_20_body">Uno de los momentos más importantes del día fue conseguir ejecutar por primera vez la aplicación <text:soft-page-break/>en el emulador Android.</text:p>
      <text:p text:style-name="Text_20_body">El proceso no fue inmediato:</text:p>
      <text:list text:style-name="L3">
        <text:list-item>
          <text:p text:style-name="P7">hubo dudas sobre cómo lanzar el emulador,</text:p>
        </text:list-item>
        <text:list-item>
          <text:p text:style-name="P7">problemas encontrando comandos Flutter,</text:p>
        </text:list-item>
        <text:list-item>
          <text:p text:style-name="P7">y confusión entre terminal y comandos de VS Code.</text:p>
        </text:list-item>
      </text:list>
      <text:p text:style-name="Text_20_body">Se trabajó paso a paso:</text:p>
      <text:list text:style-name="L4">
        <text:list-item>
          <text:p text:style-name="P8">abrir Android Studio,</text:p>
        </text:list-item>
        <text:list-item>
          <text:p text:style-name="P8">lanzar el emulador Pixel,</text:p>
        </text:list-item>
        <text:list-item>
          <text:p text:style-name="P8">volver a VS Code,</text:p>
        </text:list-item>
        <text:list-item>
          <text:p text:style-name="P8">ejecutar:</text:p>
        </text:list-item>
      </text:list>
      <text:p text:style-name="P5"><text:span text:style-name="Source_20_Text">flutter run</text:span></text:p>
      <text:p text:style-name="Text_20_body">Finalmente apareció la primera aplicación funcional:<text:line-break/>una pantalla negra minimalista con el texto “Bienvenido”.</text:p>
      <text:p text:style-name="Text_20_body">Aunque visualmente era muy simple, técnicamente representaba muchísimo:</text:p>
      <text:p text:style-name="Text_20_body">✅ Flutter compilando correctamente<text:line-break/>✅ conexión Android funcionando<text:line-break/>✅ emulador operativo<text:line-break/>✅ proyecto enlazado correctamente<text:line-break/>✅ flujo de desarrollo real funcionando</text:p>
      <text:p text:style-name="Text_20_body">Ese momento marcó el inicio real del proyecto.</text:p>
      <text:p text:style-name="P2"/>
      <text:h text:style-name="P1" text:outline-level="1">⚡ Descubriendo el Hot Reload</text:h>
      <text:p text:style-name="Text_20_body">Después de conseguir la primera compilación, se aprendió uno de los conceptos más potentes de Flutter:<text:line-break/>el <text:span text:style-name="Strong_20_Emphasis">Hot Reload</text:span>.</text:p>
      <text:p text:style-name="Text_20_body">Se modificó el texto:</text:p>
      <text:p text:style-name="P5"><text:span text:style-name="Source_20_Text">Bienvenido</text:span></text:p>
      <text:p text:style-name="Text_20_body">por:</text:p>
      <text:p text:style-name="P5"><text:span text:style-name="Source_20_Text">EuroLeague App</text:span></text:p>
      <text:p text:style-name="Text_20_body">y se utilizó:</text:p>
      <text:p text:style-name="P5"><text:span text:style-name="Source_20_Text">r</text:span></text:p>
      <text:p text:style-name="Text_20_body">en la terminal para actualizar la app instantáneamente.</text:p>
      <text:p text:style-name="Text_20_body">Aquí apareció una sensación muy importante:<text:line-break/>ver cambios visuales inmediatos en el móvil virtual sin recompilar toda la aplicación.</text:p>
      <text:p text:style-name="Text_20_body">Ese momento ayudó muchísimo a entender por qué Flutter es tan potente para desarrollo rápido de interfaces.</text:p>
      <text:p text:style-name="P2"/>
      <text:h text:style-name="P1" text:outline-level="1">🧭 Creando navegación real</text:h>
      <text:p text:style-name="Text_20_body">La aplicación dejó de ser una simple pantalla vacía y empezó a parecer una app real.</text:p>
      <text:p text:style-name="Text_20_body"><text:soft-page-break/>Se crearon nuevas pantallas:</text:p>
      <text:list text:style-name="L5">
        <text:list-item>
          <text:p text:style-name="P9">Games</text:p>
        </text:list-item>
        <text:list-item>
          <text:p text:style-name="P9">Standings</text:p>
        </text:list-item>
        <text:list-item>
          <text:p text:style-name="P9">Teams</text:p>
        </text:list-item>
      </text:list>
      <text:p text:style-name="Text_20_body">y se implementó navegación inferior mediante:</text:p>
      <text:p text:style-name="P5"><text:span text:style-name="Source_20_Text">BottomNavigationBar</text:span></text:p>
      <text:p text:style-name="Text_20_body">El proceso fue completamente guiado:</text:p>
      <text:list text:style-name="L6">
        <text:list-item>
          <text:p text:style-name="P10">creación de archivos,</text:p>
        </text:list-item>
        <text:list-item>
          <text:p text:style-name="P10">organización de pantallas,</text:p>
        </text:list-item>
        <text:list-item>
          <text:p text:style-name="P10">imports,</text:p>
        </text:list-item>
        <text:list-item>
          <text:p text:style-name="P10">errores de clases no encontradas,</text:p>
        </text:list-item>
        <text:list-item>
          <text:p text:style-name="P10">nombres incorrectos de archivos,</text:p>
        </text:list-item>
        <text:list-item>
          <text:p text:style-name="P10">y resolución de problemas típicos de Flutter.</text:p>
        </text:list-item>
      </text:list>
      <text:p text:style-name="Text_20_body">Hubo varios errores:</text:p>
      <text:list text:style-name="L7">
        <text:list-item>
          <text:p text:style-name="P11">nombres mal escritos,</text:p>
        </text:list-item>
        <text:list-item>
          <text:p text:style-name="P11">archivos mal guardados,</text:p>
        </text:list-item>
        <text:list-item>
          <text:p text:style-name="P11">referencias incorrectas,</text:p>
        </text:list-item>
        <text:list-item>
          <text:p text:style-name="P11">y problemas de compilación.</text:p>
        </text:list-item>
      </text:list>
      <text:p text:style-name="Text_20_body">Cada error se fue resolviendo paso a paso explicando:</text:p>
      <text:list text:style-name="L8">
        <text:list-item>
          <text:p text:style-name="P12">por qué ocurría,</text:p>
        </text:list-item>
        <text:list-item>
          <text:p text:style-name="P12">dónde buscarlo,</text:p>
        </text:list-item>
        <text:list-item>
          <text:p text:style-name="P12">y cómo piensa Flutter internamente.</text:p>
        </text:list-item>
      </text:list>
      <text:p text:style-name="Text_20_body">Cuando finalmente aparecieron:</text:p>
      <text:list text:style-name="L9">
        <text:list-item>
          <text:p text:style-name="P13">iconos,</text:p>
        </text:list-item>
        <text:list-item>
          <text:p text:style-name="P13">navegación,</text:p>
        </text:list-item>
        <text:list-item>
          <text:p text:style-name="P13">y múltiples pantallas,</text:p>
        </text:list-item>
      </text:list>
      <text:p text:style-name="Text_20_body">la app empezó a sentirse mucho más profesional.</text:p>
      <text:p text:style-name="P2"/>
      <text:h text:style-name="P1" text:outline-level="1">🃏 Construcción de GameCards modernas</text:h>
      <text:p text:style-name="Text_20_body">Posteriormente se comenzó a construir la primera interfaz deportiva real:<text:line-break/>las <text:span text:style-name="Source_20_Text">GameCard</text:span>.</text:p>
      <text:p text:style-name="Text_20_body">Estas cards mostraban:</text:p>
      <text:list text:style-name="L10">
        <text:list-item>
          <text:p text:style-name="P14">equipos,</text:p>
        </text:list-item>
        <text:list-item>
          <text:p text:style-name="P14">marcador,</text:p>
        </text:list-item>
        <text:list-item>
          <text:p text:style-name="P14">estado del partido,</text:p>
        </text:list-item>
        <text:list-item>
          <text:p text:style-name="P14">y diseño oscuro moderno.</text:p>
        </text:list-item>
      </text:list>
      <text:p text:style-name="Text_20_body">Se aprendió a trabajar con:</text:p>
      <text:list text:style-name="L11">
        <text:list-item>
          <text:p text:style-name="P15"><text:soft-page-break/><text:span text:style-name="Source_20_Text">Container</text:span></text:p>
        </text:list-item>
        <text:list-item>
          <text:p text:style-name="P15"><text:span text:style-name="Source_20_Text">Row</text:span></text:p>
        </text:list-item>
        <text:list-item>
          <text:p text:style-name="P15"><text:span text:style-name="Source_20_Text">Column</text:span></text:p>
        </text:list-item>
        <text:list-item>
          <text:p text:style-name="P15"><text:span text:style-name="Source_20_Text">SizedBox</text:span></text:p>
        </text:list-item>
        <text:list-item>
          <text:p text:style-name="P15">estilos</text:p>
        </text:list-item>
        <text:list-item>
          <text:p text:style-name="P15">separación visual</text:p>
        </text:list-item>
        <text:list-item>
          <text:p text:style-name="P15">reutilización de widgets</text:p>
        </text:list-item>
      </text:list>
      <text:p text:style-name="Text_20_body">Código importante del día:</text:p>
      <text:p text:style-name="P5"><text:span text:style-name="Source_20_Text">class GameCard extends StatelessWidget {</text:span></text:p>
      <text:p text:style-name="Text_20_body">Este momento fue clave porque introdujo la idea de:</text:p>
      <text:p text:style-name="P6">crear componentes reutilizables para construir interfaces complejas.</text:p>
      <text:p text:style-name="Text_20_body">También aparecieron los primeros errores reales relacionados con:</text:p>
      <text:list text:style-name="L12">
        <text:list-item>
          <text:p text:style-name="P16">paréntesis,</text:p>
        </text:list-item>
        <text:list-item>
          <text:p text:style-name="P16">llaves,</text:p>
        </text:list-item>
        <text:list-item>
          <text:p text:style-name="P16">indentación,</text:p>
        </text:list-item>
        <text:list-item>
          <text:p text:style-name="P16">y estructura visual.</text:p>
        </text:list-item>
      </text:list>
      <text:p text:style-name="Text_20_body">En varios momentos fue necesario reemplazar archivos completos para evitar errores acumulados y facilitar el aprendizaje.</text:p>
      <text:p text:style-name="P2"/>
      <text:h text:style-name="P1" text:outline-level="1">🧠 Primer modelo de datos real — Team</text:h>
      <text:p text:style-name="Text_20_body">Uno de los pasos más importantes de la sesión fue crear el primer modelo de datos:</text:p>
      <text:p text:style-name="P5"><text:span text:style-name="Source_20_Text">class Team {</text:span></text:p>
      <text:p text:style-name="P5"><text:span text:style-name="Source_20_Text"><text:s text:c="2"/>final String name;</text:span></text:p>
      <text:p text:style-name="P5"><text:span text:style-name="Source_20_Text"><text:s text:c="2"/>final String logo;</text:span></text:p>
      <text:p text:style-name="P5"><text:span text:style-name="Source_20_Text">}</text:span></text:p>
      <text:p text:style-name="Text_20_body">Hasta ese momento los equipos eran simplemente texto:</text:p>
      <text:p text:style-name="P5"><text:span text:style-name="Source_20_Text">homeTeam: "Real Madrid"</text:span></text:p>
      <text:p text:style-name="Text_20_body">Posteriormente se transformaron en objetos completos:</text:p>
      <text:p text:style-name="P5"><text:span text:style-name="Source_20_Text">Team(</text:span></text:p>
      <text:p text:style-name="P5"><text:span text:style-name="Source_20_Text"><text:s text:c="2"/>name: "Real Madrid",</text:span></text:p>
      <text:p text:style-name="P5"><text:span text:style-name="Source_20_Text"><text:s text:c="2"/>logo: "real_madrid.png",</text:span></text:p>
      <text:p text:style-name="P5"><text:span text:style-name="Source_20_Text">)</text:span></text:p>
      <text:p text:style-name="Text_20_body">Este cambio no alteró visualmente la aplicación, pero sí transformó completamente la arquitectura interna.</text:p>
      <text:p text:style-name="Text_20_body">Aquí se explicó una idea muy importante:</text:p>
      <text:p text:style-name="P6">las apps profesionales no trabajan con texto suelto, sino con modelos estructurados.</text:p>
      <text:p text:style-name="Text_20_body">Esto dejó preparada la aplicación para futuras funcionalidades:</text:p>
      <text:list text:style-name="L13">
        <text:list-item>
          <text:p text:style-name="P17">APIs reales,</text:p>
        </text:list-item>
        <text:list-item>
          <text:p text:style-name="P17"><text:soft-page-break/>estadísticas,</text:p>
        </text:list-item>
        <text:list-item>
          <text:p text:style-name="P17">favoritos,</text:p>
        </text:list-item>
        <text:list-item>
          <text:p text:style-name="P17">rankings,</text:p>
        </text:list-item>
        <text:list-item>
          <text:p text:style-name="P17">datos dinámicos,</text:p>
        </text:list-item>
        <text:list-item>
          <text:p text:style-name="P17">y lógica avanzada.</text:p>
        </text:list-item>
      </text:list>
      <text:p text:style-name="P2"/>
      <text:h text:style-name="P1" text:outline-level="1">🖼️ Integración de assets y logos reales</text:h>
      <text:p text:style-name="Text_20_body">Probablemente la parte más emocionante y frustrante del día al mismo tiempo.</text:p>
      <text:p text:style-name="Text_20_body">Se aprendió:</text:p>
      <text:list text:style-name="L14">
        <text:list-item>
          <text:p text:style-name="P18">cómo crear carpetas <text:span text:style-name="Source_20_Text">assets</text:span>,</text:p>
        </text:list-item>
        <text:list-item>
          <text:p text:style-name="P18">cómo configurar <text:span text:style-name="Source_20_Text">pubspec.yaml</text:span>,</text:p>
        </text:list-item>
        <text:list-item>
          <text:p text:style-name="P18">cómo registrar imágenes,</text:p>
        </text:list-item>
        <text:list-item>
          <text:p text:style-name="P18">cómo cargar assets locales,</text:p>
        </text:list-item>
        <text:list-item>
          <text:p text:style-name="P18">y cómo funcionan las rutas en Flutter.</text:p>
        </text:list-item>
      </text:list>
      <text:p text:style-name="Text_20_body">Configuración realizada:</text:p>
      <text:p text:style-name="P5"><text:span text:style-name="Source_20_Text">assets:</text:span></text:p>
      <text:p text:style-name="P5"><text:span text:style-name="Source_20_Text"><text:s text:c="2"/>- assets/logos/</text:span></text:p>
      <text:p text:style-name="Text_20_body">Posteriormente se añadieron logos reales de:</text:p>
      <text:list text:style-name="L15">
        <text:list-item>
          <text:p text:style-name="P19">Real Madrid</text:p>
        </text:list-item>
        <text:list-item>
          <text:p text:style-name="P19">Fenerbahce</text:p>
        </text:list-item>
        <text:list-item>
          <text:p text:style-name="P19">Olympiacos</text:p>
        </text:list-item>
        <text:list-item>
          <text:p text:style-name="P19">Barcelona</text:p>
        </text:list-item>
        <text:list-item>
          <text:p text:style-name="P19">Partizan</text:p>
        </text:list-item>
        <text:list-item>
          <text:p text:style-name="P19">Monaco</text:p>
        </text:list-item>
      </text:list>
      <text:p text:style-name="Text_20_body">Durante esta parte aparecieron muchos errores reales:</text:p>
      <text:list text:style-name="L16">
        <text:list-item>
          <text:p text:style-name="P20">rutas mal escritas,</text:p>
        </text:list-item>
        <text:list-item>
          <text:p text:style-name="P20">nombres incorrectos,</text:p>
        </text:list-item>
        <text:list-item>
          <text:p text:style-name="P20">archivos sin extensión <text:span text:style-name="Source_20_Text">.png</text:span>,</text:p>
        </text:list-item>
        <text:list-item>
          <text:p text:style-name="P20">problemas de caché,</text:p>
        </text:list-item>
        <text:list-item>
          <text:p text:style-name="P20">assets no encontrados,</text:p>
        </text:list-item>
        <text:list-item>
          <text:p text:style-name="P20">y referencias equivocadas entre <text:span text:style-name="Source_20_Text">homeTeam.logo</text:span> y <text:span text:style-name="Source_20_Text">awayTeam.logo</text:span>.</text:p>
        </text:list-item>
      </text:list>
      <text:p text:style-name="Text_20_body">Uno de los momentos clave ocurrió cuando se descubrió que:</text:p>
      <text:list text:style-name="L17">
        <text:list-item>
          <text:p text:style-name="P21">el logo del equipo visitante utilizaba accidentalmente el logo del equipo local.</text:p>
        </text:list-item>
      </text:list>
      <text:p text:style-name="Text_20_body">El problema se resolvió corrigiendo:</text:p>
      <text:p text:style-name="P5"><text:span text:style-name="Source_20_Text">homeTeam.logo</text:span></text:p>
      <text:p text:style-name="Text_20_body">por:</text:p>
      <text:p text:style-name="P5"><text:soft-page-break/><text:span text:style-name="Source_20_Text">awayTeam.logo</text:span></text:p>
      <text:p text:style-name="Text_20_body">Y ahí llegó probablemente el momento más satisfactorio del día:</text:p>
      <text:p text:style-name="P6">“HOLY FUCK IT WORKS.”</text:p>
      <text:p text:style-name="Text_20_body">Finalmente todos los logos aparecieron correctamente en pantalla.</text:p>
      <text:p text:style-name="P2"/>
      <text:h text:style-name="P1" text:outline-level="1">🔥 Estado final de la aplicación</text:h>
      <text:p text:style-name="Text_20_body">Al terminar la sesión, la aplicación ya incluía:</text:p>
      <text:p text:style-name="Text_20_body">✅ navegación funcional<text:line-break/>✅ diseño oscuro moderno<text:line-break/>✅ GameCards deportivas<text:line-break/>✅ logos reales<text:line-break/>✅ arquitectura modular<text:line-break/>✅ modelos de datos<text:line-break/>✅ assets configurados correctamente<text:line-break/>✅ flujo Flutter funcional<text:line-break/>✅ Android Emulator operativo<text:line-break/>✅ Hot Reload / Hot Restart<text:line-break/>✅ estructura preparada para crecer</text:p>
      <text:p text:style-name="P2"/>
      <text:h text:style-name="P1" text:outline-level="1">🚀 Reflexión final</text:h>
      <text:p text:style-name="Text_20_body">Lo más importante del día no ha sido únicamente el resultado visual.</text:p>
      <text:p text:style-name="Text_20_body">Ha sido descubrir que desarrollar aplicaciones móviles reales ya no parece algo “mágico” o inaccesible.</text:p>
      <text:p text:style-name="Text_20_body">La sesión también dejó una sensación muy clara:<text:line-break/>programar no consiste en escribir código perfecto desde el principio.</text:p>
      <text:p text:style-name="Text_20_body">Consiste en:</text:p>
      <text:list text:style-name="L18">
        <text:list-item>
          <text:p text:style-name="P22">probar,</text:p>
        </text:list-item>
        <text:list-item>
          <text:p text:style-name="P22">romper cosas,</text:p>
        </text:list-item>
        <text:list-item>
          <text:p text:style-name="P22">entender errores,</text:p>
        </text:list-item>
        <text:list-item>
          <text:p text:style-name="P22">corregir,</text:p>
        </text:list-item>
        <text:list-item>
          <text:p text:style-name="P22">iterar,</text:p>
        </text:list-item>
        <text:list-item>
          <text:p text:style-name="P22">y avanzar poco a poco.</text:p>
        </text:list-item>
      </text:list>
      <text:p text:style-name="Text_20_body">Y hoy, por primera vez, el proyecto empezó realmente a sentirse viv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text-properties style:font-name="Times New Roman" fo:font-family="'Times New Roman'" style:font-family-generic="roman" style:font-pitch="variable" fo:font-size="24pt" fo:font-weight="bold" style:font-name-asian="MS Gothic" style:font-family-asian="'MS Gothic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T4M15S</meta:editing-duration>
    <meta:editing-cycles>4</meta:editing-cycles>
    <meta:generator>LibreOffice/26.2.3.2$Windows_X86_64 LibreOffice_project/70e089b17412e4cb7773e41413306b17a2328c34</meta:generator>
    <dc:date>2026-05-17T16:28:18.996319600</dc:date>
    <meta:document-statistic meta:table-count="0" meta:image-count="0" meta:object-count="0" meta:page-count="6" meta:paragraph-count="179" meta:word-count="1080" meta:character-count="6806" meta:non-whitespace-character-count="5967"/>
    <meta:user-defined meta:name="Info 1"/>
    <meta:user-defined meta:name="Info 2"/>
    <meta:user-defined meta:name="Info 3"/>
    <meta:user-defined meta:name="Info 4"/>
  </office:meta>
</office:document-meta>
</file>